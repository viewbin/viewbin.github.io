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217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0pt" style:font-name-complex="Tahoma"/>
    </style:style>
    <style:style style:name="ce2" style:family="table-cell" style:parent-style-name="Default">
      <style:text-properties style:use-window-font-color="true" style:text-outline="false" style:text-line-through-style="none" fo:language="ru" fo:country="R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1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/>
      <table:table table:name="формула 1" table:style-name="ta1">
        <table:shapes>
          <draw:frame draw:z-index="0" draw:style-name="gr1" svg:width="6.2988in" svg:height="3.5429in" svg:x="0.0394in" svg:y="0.4567in">
            <draw:object draw:notify-on-update-of-ranges="'формула 1'.A1:'формула 1'.A1 'формула 1'.B1:'формула 1'.H1 'формула 1'.A2:'формула 1'.A2 'формула 1'.B2:'формула 1'.H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>
            <text:p>x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f(x)</text:p>
          </table:table-cell>
          <table:table-cell table:formula="of:=[.B1]^4 - 2*[.B1]^3 + 2*[.B1] + 1" office:value-type="float" office:value="2">
            <text:p>2</text:p>
          </table:table-cell>
          <table:table-cell table:formula="of:=[.C1]^4 - 2*[.C1]^3 + 2*[.C1] + 1" office:value-type="float" office:value="0.3125">
            <text:p>0.3125</text:p>
          </table:table-cell>
          <table:table-cell table:formula="of:=[.D1]^4 - 2*[.D1]^3 + 2*[.D1] + 1" office:value-type="float" office:value="1">
            <text:p>1</text:p>
          </table:table-cell>
          <table:table-cell table:formula="of:=[.E1]^4 - 2*[.E1]^3 + 2*[.E1] + 1" office:value-type="float" office:value="1.8125">
            <text:p>1.8125</text:p>
          </table:table-cell>
          <table:table-cell table:formula="of:=[.F1]^4 - 2*[.F1]^3 + 2*[.F1] + 1" office:value-type="float" office:value="2">
            <text:p>2</text:p>
          </table:table-cell>
          <table:table-cell table:formula="of:=[.G1]^4 - 2*[.G1]^3 + 2*[.G1] + 1" office:value-type="float" office:value="2.3125">
            <text:p>2.3125</text:p>
          </table:table-cell>
          <table:table-cell table:formula="of:=[.H1]^4 - 2*[.H1]^3 + 2*[.H1] + 1" office:value-type="float" office:value="5">
            <text:p>5</text:p>
          </table:table-cell>
        </table:table-row>
        <table:table-row table:style-name="ro1" table:number-rows-repeated="104857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формула 2" table:style-name="ta2">
        <table:shapes>
          <draw:frame draw:z-index="0" draw:style-name="gr1" svg:width="6.2988in" svg:height="3.5429in" svg:x="0.0185in" svg:y="0.8224in">
            <draw:object draw:notify-on-update-of-ranges="'формула 2'.A1:'формула 2'.A1 'формула 2'.B1:'формула 2'.R1 'формула 2'.A2:'формула 2'.A2 'формула 2'.B2:'формула 2'.R2 'формула 2'.A3:'формула 2'.A3 'формула 2'.B3:'формула 2'.R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2">
          <table:table-cell office:value-type="string">
            <text:p>x</text:p>
          </table:table-cell>
          <table:table-cell table:style-name="ce2" office:value-type="float" office:value="-2">
            <text:p>-2</text:p>
          </table:table-cell>
          <table:table-cell office:value-type="float" office:value="-1.75">
            <text:p>-1.75</text:p>
          </table:table-cell>
          <table:table-cell table:style-name="ce2" office:value-type="float" office:value="-1.5">
            <text:p>-1.5</text:p>
          </table:table-cell>
          <table:table-cell office:value-type="float" office:value="-1.25">
            <text:p>-1.25</text:p>
          </table:table-cell>
          <table:table-cell table:style-name="ce2" office:value-type="float" office:value="-1">
            <text:p>-1</text:p>
          </table:table-cell>
          <table:table-cell office:value-type="float" office:value="-0.75">
            <text:p>-0.75</text:p>
          </table:table-cell>
          <table:table-cell table:style-name="ce2" office:value-type="float" office:value="-0.5">
            <text:p>-0.5</text:p>
          </table:table-cell>
          <table:table-cell office:value-type="float" office:value="-0.25">
            <text:p>-0.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style-name="ce2" office:value-type="float" office:value="0.75">
            <text:p>0.75</text:p>
          </table:table-cell>
          <table:table-cell table:style-name="ce2" office:value-type="float" office:value="1">
            <text:p>1</text:p>
          </table:table-cell>
          <table:table-cell office:value-type="float" office:value="1.25">
            <text:p>1.25</text:p>
          </table:table-cell>
          <table:table-cell table:style-name="ce2" office:value-type="float" office:value="1.5">
            <text:p>1.5</text:p>
          </table:table-cell>
          <table:table-cell table:style-name="ce2" office:value-type="float" office:value="1.75">
            <text:p>1.75</text:p>
          </table:table-cell>
          <table:table-cell table:style-name="ce2" office:value-type="float" office:value="2">
            <text:p>2</text:p>
          </table:table-cell>
        </table:table-row>
        <table:table-row table:style-name="ro2">
          <table:table-cell office:value-type="string">
            <text:p>y<text:span text:style-name="T1">1</text:span></text:p>
          </table:table-cell>
          <table:table-cell table:formula="of:=[.B1]^3" office:value-type="float" office:value="-8">
            <text:p>-8</text:p>
          </table:table-cell>
          <table:table-cell table:formula="of:=[.C1]^3" office:value-type="float" office:value="-5.359375">
            <text:p>-5.359375</text:p>
          </table:table-cell>
          <table:table-cell table:formula="of:=[.D1]^3" office:value-type="float" office:value="-3.375">
            <text:p>-3.375</text:p>
          </table:table-cell>
          <table:table-cell table:formula="of:=[.E1]^3" office:value-type="float" office:value="-1.953125">
            <text:p>-1.953125</text:p>
          </table:table-cell>
          <table:table-cell table:formula="of:=[.F1]^3" office:value-type="float" office:value="-1">
            <text:p>-1</text:p>
          </table:table-cell>
          <table:table-cell table:formula="of:=[.G1]^3" office:value-type="float" office:value="-0.421875">
            <text:p>-0.421875</text:p>
          </table:table-cell>
          <table:table-cell table:formula="of:=[.H1]^3" office:value-type="float" office:value="-0.125">
            <text:p>-0.125</text:p>
          </table:table-cell>
          <table:table-cell table:formula="of:=[.I1]^3" office:value-type="float" office:value="-0.015625">
            <text:p>-0.015625</text:p>
          </table:table-cell>
          <table:table-cell table:formula="of:=[.J1]^3" office:value-type="float" office:value="0">
            <text:p>0</text:p>
          </table:table-cell>
          <table:table-cell table:formula="of:=[.K1]^3" office:value-type="float" office:value="0.015625">
            <text:p>0.015625</text:p>
          </table:table-cell>
          <table:table-cell table:formula="of:=[.L1]^3" office:value-type="float" office:value="0.125">
            <text:p>0.125</text:p>
          </table:table-cell>
          <table:table-cell table:formula="of:=[.M1]^3" office:value-type="float" office:value="0.421875">
            <text:p>0.421875</text:p>
          </table:table-cell>
          <table:table-cell table:formula="of:=[.N1]^3" office:value-type="float" office:value="1">
            <text:p>1</text:p>
          </table:table-cell>
          <table:table-cell table:formula="of:=[.O1]^3" office:value-type="float" office:value="1.953125">
            <text:p>1.953125</text:p>
          </table:table-cell>
          <table:table-cell table:formula="of:=[.P1]^3" office:value-type="float" office:value="3.375">
            <text:p>3.375</text:p>
          </table:table-cell>
          <table:table-cell table:formula="of:=[.Q1]^3" office:value-type="float" office:value="5.359375">
            <text:p>5.359375</text:p>
          </table:table-cell>
          <table:table-cell table:formula="of:=[.R1]^3" office:value-type="float" office:value="8">
            <text:p>8</text:p>
          </table:table-cell>
        </table:table-row>
        <table:table-row table:style-name="ro2">
          <table:table-cell office:value-type="string">
            <text:p>y<text:span text:style-name="T1">2</text:span></text:p>
          </table:table-cell>
          <table:table-cell table:formula="of:=[.B1]^2 - 1" office:value-type="float" office:value="3">
            <text:p>3</text:p>
          </table:table-cell>
          <table:table-cell table:formula="of:=[.C1]^2 - 1" office:value-type="float" office:value="2.0625">
            <text:p>2.0625</text:p>
          </table:table-cell>
          <table:table-cell table:formula="of:=[.D1]^2 - 1" office:value-type="float" office:value="1.25">
            <text:p>1.25</text:p>
          </table:table-cell>
          <table:table-cell table:formula="of:=[.E1]^2 - 1" office:value-type="float" office:value="0.5625">
            <text:p>0.5625</text:p>
          </table:table-cell>
          <table:table-cell table:formula="of:=[.F1]^2 - 1" office:value-type="float" office:value="0">
            <text:p>0</text:p>
          </table:table-cell>
          <table:table-cell table:formula="of:=[.G1]^2 - 1" office:value-type="float" office:value="-0.4375">
            <text:p>-0.4375</text:p>
          </table:table-cell>
          <table:table-cell table:formula="of:=[.H1]^2 - 1" office:value-type="float" office:value="-0.75">
            <text:p>-0.75</text:p>
          </table:table-cell>
          <table:table-cell table:formula="of:=[.I1]^2 - 1" office:value-type="float" office:value="-0.9375">
            <text:p>-0.9375</text:p>
          </table:table-cell>
          <table:table-cell table:formula="of:=[.J1]^2 - 1" office:value-type="float" office:value="-1">
            <text:p>-1</text:p>
          </table:table-cell>
          <table:table-cell table:formula="of:=[.K1]^2 - 1" office:value-type="float" office:value="-0.9375">
            <text:p>-0.9375</text:p>
          </table:table-cell>
          <table:table-cell table:formula="of:=[.L1]^2 - 1" office:value-type="float" office:value="-0.75">
            <text:p>-0.75</text:p>
          </table:table-cell>
          <table:table-cell table:formula="of:=[.M1]^2 - 1" office:value-type="float" office:value="-0.4375">
            <text:p>-0.4375</text:p>
          </table:table-cell>
          <table:table-cell table:formula="of:=[.N1]^2 - 1" office:value-type="float" office:value="0">
            <text:p>0</text:p>
          </table:table-cell>
          <table:table-cell table:formula="of:=[.O1]^2 - 1" office:value-type="float" office:value="0.5625">
            <text:p>0.5625</text:p>
          </table:table-cell>
          <table:table-cell table:formula="of:=[.P1]^2 - 1" office:value-type="float" office:value="1.25">
            <text:p>1.25</text:p>
          </table:table-cell>
          <table:table-cell table:formula="of:=[.Q1]^2 - 1" office:value-type="float" office:value="2.0625">
            <text:p>2.0625</text:p>
          </table:table-cell>
          <table:table-cell table:formula="of:=[.R1]^2 - 1" office:value-type="float" office:value="3">
            <text:p>3</text:p>
          </table:table-cell>
        </table:table-row>
        <table:table-row table:style-name="ro1" table:number-rows-repeated="104857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формула 3 часть 1" table:style-name="ta2">
        <table:shapes>
          <draw:frame draw:z-index="0" draw:style-name="gr1" svg:width="6.2988in" svg:height="3.5429in" svg:x="0.0394in" svg:y="0.6654in">
            <draw:object draw:notify-on-update-of-ranges="'формула 3 часть 1'.A1:'формула 3 часть 1'.A1 'формула 3 часть 1'.B1:'формула 3 часть 1'.V1 'формула 3 часть 1'.A2:'формула 3 часть 1'.A2 'формула 3 часть 1'.B2:'формула 3 часть 1'.V2 'формула 3 часть 1'.A3:'формула 3 часть 1'.A3 'формула 3 часть 1'.B3:'формула 3 часть 1'.V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4" table:default-cell-style-name="Default"/>
        <table:table-row table:style-name="ro2">
          <table:table-cell office:value-type="string">
            <text:p>x</text:p>
          </table:table-cell>
          <table:table-cell table:style-name="ce2" office:value-type="float" office:value="-5">
            <text:p>-5</text:p>
          </table:table-cell>
          <table:table-cell office:value-type="float" office:value="-4.5">
            <text:p>-4.5</text:p>
          </table:table-cell>
          <table:table-cell table:style-name="ce2" office:value-type="float" office:value="-4">
            <text:p>-4</text:p>
          </table:table-cell>
          <table:table-cell office:value-type="float" office:value="-3.5">
            <text:p>-3.5</text:p>
          </table:table-cell>
          <table:table-cell table:style-name="ce2" office:value-type="float" office:value="-3">
            <text:p>-3</text:p>
          </table:table-cell>
          <table:table-cell office:value-type="float" office:value="-2.5">
            <text:p>-2.5</text:p>
          </table:table-cell>
          <table:table-cell table:style-name="ce2" office:value-type="float" office:value="-2">
            <text:p>-2</text:p>
          </table:table-cell>
          <table:table-cell office:value-type="float" office:value="-1.5">
            <text:p>-1.5</text:p>
          </table:table-cell>
          <table:table-cell table:style-name="ce2" office:value-type="float" office:value="-1">
            <text:p>-1</text:p>
          </table:table-cell>
          <table:table-cell office:value-type="float" office:value="-0.5">
            <text:p>-0.5</text:p>
          </table:table-cell>
          <table:table-cell table:style-name="ce2" office:value-type="float" office:value="0">
            <text:p>0</text:p>
          </table:table-cell>
          <table:table-cell office:value-type="float" office:value="0.5">
            <text:p>0.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.5">
            <text:p>1.5</text:p>
          </table:table-cell>
          <table:table-cell office:value-type="float" office:value="2">
            <text:p>2</text:p>
          </table:table-cell>
          <table:table-cell table:style-name="ce2" office:value-type="float" office:value="2.5">
            <text:p>2.5</text:p>
          </table:table-cell>
          <table:table-cell office:value-type="float" office:value="3">
            <text:p>3</text:p>
          </table:table-cell>
          <table:table-cell table:style-name="ce2" office:value-type="float" office:value="3.5">
            <text:p>3.5</text:p>
          </table:table-cell>
          <table:table-cell office:value-type="float" office:value="4">
            <text:p>4</text:p>
          </table:table-cell>
          <table:table-cell table:style-name="ce2" office:value-type="float" office:value="4.5">
            <text:p>4.5</text:p>
          </table:table-cell>
          <table:table-cell office:value-type="float" office:value="5">
            <text:p>5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2">
          <table:table-cell office:value-type="string">
            <text:p>y<text:span text:style-name="T1">1</text:span></text:p>
          </table:table-cell>
          <table:table-cell table:formula="of:=SIN(2*[.B1])" office:value-type="float" office:value="0.54402111088937">
            <text:p>0.5440211109</text:p>
          </table:table-cell>
          <table:table-cell table:formula="of:=SIN(2*[.C1])" office:value-type="float" office:value="-0.412118485241757">
            <text:p>-0.4121184852</text:p>
          </table:table-cell>
          <table:table-cell table:formula="of:=SIN(2*[.D1])" office:value-type="float" office:value="-0.989358246623382">
            <text:p>-0.9893582466</text:p>
          </table:table-cell>
          <table:table-cell table:formula="of:=SIN(2*[.E1])" office:value-type="float" office:value="-0.656986598718789">
            <text:p>-0.6569865987</text:p>
          </table:table-cell>
          <table:table-cell table:formula="of:=SIN(2*[.F1])" office:value-type="float" office:value="0.279415498198926">
            <text:p>0.2794154982</text:p>
          </table:table-cell>
          <table:table-cell table:formula="of:=SIN(2*[.G1])" office:value-type="float" office:value="0.958924274663139">
            <text:p>0.9589242747</text:p>
          </table:table-cell>
          <table:table-cell table:formula="of:=SIN(2*[.H1])" office:value-type="float" office:value="0.756802495307928">
            <text:p>0.7568024953</text:p>
          </table:table-cell>
          <table:table-cell table:formula="of:=SIN(2*[.I1])" office:value-type="float" office:value="-0.141120008059867">
            <text:p>-0.1411200081</text:p>
          </table:table-cell>
          <table:table-cell table:formula="of:=SIN(2*[.J1])" office:value-type="float" office:value="-0.909297426825682">
            <text:p>-0.9092974268</text:p>
          </table:table-cell>
          <table:table-cell table:formula="of:=SIN(2*[.K1])" office:value-type="float" office:value="-0.841470984807896">
            <text:p>-0.8414709848</text:p>
          </table:table-cell>
          <table:table-cell table:formula="of:=SIN(2*[.L1])" office:value-type="float" office:value="0">
            <text:p>0</text:p>
          </table:table-cell>
          <table:table-cell table:formula="of:=SIN(2*[.M1])" office:value-type="float" office:value="0.841470984807896">
            <text:p>0.8414709848</text:p>
          </table:table-cell>
          <table:table-cell table:formula="of:=SIN(2*[.N1])" office:value-type="float" office:value="0.909297426825682">
            <text:p>0.9092974268</text:p>
          </table:table-cell>
          <table:table-cell table:formula="of:=SIN(2*[.O1])" office:value-type="float" office:value="0.141120008059867">
            <text:p>0.1411200081</text:p>
          </table:table-cell>
          <table:table-cell table:formula="of:=SIN(2*[.P1])" office:value-type="float" office:value="-0.756802495307928">
            <text:p>-0.7568024953</text:p>
          </table:table-cell>
          <table:table-cell table:formula="of:=SIN(2*[.Q1])" office:value-type="float" office:value="-0.958924274663139">
            <text:p>-0.9589242747</text:p>
          </table:table-cell>
          <table:table-cell table:formula="of:=SIN(2*[.R1])" office:value-type="float" office:value="-0.279415498198926">
            <text:p>-0.2794154982</text:p>
          </table:table-cell>
          <table:table-cell table:formula="of:=SIN(2*[.S1])" office:value-type="float" office:value="0.656986598718789">
            <text:p>0.6569865987</text:p>
          </table:table-cell>
          <table:table-cell table:formula="of:=SIN(2*[.T1])" office:value-type="float" office:value="0.989358246623382">
            <text:p>0.9893582466</text:p>
          </table:table-cell>
          <table:table-cell table:formula="of:=SIN(2*[.U1])" office:value-type="float" office:value="0.412118485241757">
            <text:p>0.4121184852</text:p>
          </table:table-cell>
          <table:table-cell table:formula="of:=SIN(2*[.V1])" office:value-type="float" office:value="-0.54402111088937">
            <text:p>-0.5440211109</text:p>
          </table:table-cell>
          <table:table-cell table:number-columns-repeated="12"/>
        </table:table-row>
        <table:table-row table:style-name="ro2">
          <table:table-cell office:value-type="string">
            <text:p>y<text:span text:style-name="T1">2</text:span></text:p>
          </table:table-cell>
          <table:table-cell table:style-name="ce3" table:formula="of:=COS(3*[.B1])" office:value-type="float" office:value="-0.759687912858821">
            <text:p>-0.7596879129</text:p>
          </table:table-cell>
          <table:table-cell table:style-name="ce3" table:formula="of:=COS(3*[.C1])" office:value-type="float" office:value="0.594920663309892">
            <text:p>0.5949206633</text:p>
          </table:table-cell>
          <table:table-cell table:style-name="ce3" table:formula="of:=COS(3*[.D1])" office:value-type="float" office:value="0.843853958732492">
            <text:p>0.8438539587</text:p>
          </table:table-cell>
          <table:table-cell table:style-name="ce3" table:formula="of:=COS(3*[.E1])" office:value-type="float" office:value="-0.475536927995992">
            <text:p>-0.475536928</text:p>
          </table:table-cell>
          <table:table-cell table:style-name="ce3" table:formula="of:=COS(3*[.F1])" office:value-type="float" office:value="-0.911130261884677">
            <text:p>-0.9111302619</text:p>
          </table:table-cell>
          <table:table-cell table:style-name="ce3" table:formula="of:=COS(3*[.G1])" office:value-type="float" office:value="0.346635317835026">
            <text:p>0.3466353178</text:p>
          </table:table-cell>
          <table:table-cell table:style-name="ce3" table:formula="of:=COS(3*[.H1])" office:value-type="float" office:value="0.960170286650366">
            <text:p>0.9601702867</text:p>
          </table:table-cell>
          <table:table-cell table:style-name="ce3" table:formula="of:=COS(3*[.I1])" office:value-type="float" office:value="-0.21079579943078">
            <text:p>-0.2107957994</text:p>
          </table:table-cell>
          <table:table-cell table:style-name="ce3" table:formula="of:=COS(3*[.J1])" office:value-type="float" office:value="-0.989992496600445">
            <text:p>-0.9899924966</text:p>
          </table:table-cell>
          <table:table-cell table:style-name="ce3" table:formula="of:=COS(3*[.K1])" office:value-type="float" office:value="0.0707372016677029">
            <text:p>0.0707372017</text:p>
          </table:table-cell>
          <table:table-cell table:style-name="ce3" table:formula="of:=COS(3*[.L1])" office:value-type="float" office:value="1">
            <text:p>1</text:p>
          </table:table-cell>
          <table:table-cell table:style-name="ce3" table:formula="of:=COS(3*[.M1])" office:value-type="float" office:value="0.0707372016677029">
            <text:p>0.0707372017</text:p>
          </table:table-cell>
          <table:table-cell table:style-name="ce3" table:formula="of:=COS(3*[.N1])" office:value-type="float" office:value="-0.989992496600445">
            <text:p>-0.9899924966</text:p>
          </table:table-cell>
          <table:table-cell table:style-name="ce3" table:formula="of:=COS(3*[.O1])" office:value-type="float" office:value="-0.21079579943078">
            <text:p>-0.2107957994</text:p>
          </table:table-cell>
          <table:table-cell table:style-name="ce3" table:formula="of:=COS(3*[.P1])" office:value-type="float" office:value="0.960170286650366">
            <text:p>0.9601702867</text:p>
          </table:table-cell>
          <table:table-cell table:style-name="ce3" table:formula="of:=COS(3*[.Q1])" office:value-type="float" office:value="0.346635317835026">
            <text:p>0.3466353178</text:p>
          </table:table-cell>
          <table:table-cell table:style-name="ce3" table:formula="of:=COS(3*[.R1])" office:value-type="float" office:value="-0.911130261884677">
            <text:p>-0.9111302619</text:p>
          </table:table-cell>
          <table:table-cell table:style-name="ce3" table:formula="of:=COS(3*[.S1])" office:value-type="float" office:value="-0.475536927995992">
            <text:p>-0.475536928</text:p>
          </table:table-cell>
          <table:table-cell table:style-name="ce3" table:formula="of:=COS(3*[.T1])" office:value-type="float" office:value="0.843853958732492">
            <text:p>0.8438539587</text:p>
          </table:table-cell>
          <table:table-cell table:style-name="ce3" table:formula="of:=COS(3*[.U1])" office:value-type="float" office:value="0.594920663309892">
            <text:p>0.5949206633</text:p>
          </table:table-cell>
          <table:table-cell table:style-name="ce3" table:formula="of:=COS(3*[.V1])" office:value-type="float" office:value="-0.759687912858821">
            <text:p>-0.7596879129</text:p>
          </table:table-cell>
          <table:table-cell table:number-columns-repeated="12"/>
        </table:table-row>
        <table:table-row table:style-name="ro1" table:number-rows-repeated="1048572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формула 3 часть 2" table:style-name="ta2">
        <table:table-column table:style-name="co1" table:number-columns-repeated="18" table:default-cell-style-name="Default"/>
        <table:table-row table:style-name="ro1"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</table:table-row>
        <table:table-row table:style-name="ro2">
          <table:table-cell office:value-type="string">
            <text:p>y<text:span text:style-name="T1">1</text:span></text:p>
          </table:table-cell>
          <table:table-cell table:formula="of:=1/[.B1]" office:value-type="float" office:value="1">
            <text:p>1</text:p>
          </table:table-cell>
          <table:table-cell table:formula="of:=1/[.C1]" office:value-type="float" office:value="0.5">
            <text:p>0.5</text:p>
          </table:table-cell>
          <table:table-cell table:formula="of:=1/[.D1]" office:value-type="float" office:value="0.333333333333333">
            <text:p>0.3333333333</text:p>
          </table:table-cell>
          <table:table-cell table:formula="of:=1/[.E1]" office:value-type="float" office:value="0.25">
            <text:p>0.25</text:p>
          </table:table-cell>
          <table:table-cell table:formula="of:=1/[.F1]" office:value-type="float" office:value="0.2">
            <text:p>0.2</text:p>
          </table:table-cell>
          <table:table-cell table:formula="of:=1/[.G1]" office:value-type="float" office:value="0.166666666666667">
            <text:p>0.1666666667</text:p>
          </table:table-cell>
          <table:table-cell table:formula="of:=1/[.H1]" office:value-type="float" office:value="0.142857142857143">
            <text:p>0.1428571429</text:p>
          </table:table-cell>
          <table:table-cell table:formula="of:=1/[.I1]" office:value-type="float" office:value="0.125">
            <text:p>0.125</text:p>
          </table:table-cell>
          <table:table-cell table:formula="of:=1/[.J1]" office:value-type="float" office:value="0.111111111111111">
            <text:p>0.1111111111</text:p>
          </table:table-cell>
          <table:table-cell table:formula="of:=1/[.K1]" office:value-type="float" office:value="0.1">
            <text:p>0.1</text:p>
          </table:table-cell>
          <table:table-cell table:formula="of:=1/[.L1]" office:value-type="float" office:value="0.0909090909090909">
            <text:p>0.0909090909</text:p>
          </table:table-cell>
          <table:table-cell table:formula="of:=1/[.M1]" office:value-type="float" office:value="0.0833333333333333">
            <text:p>0.0833333333</text:p>
          </table:table-cell>
          <table:table-cell table:formula="of:=1/[.N1]" office:value-type="float" office:value="0.0769230769230769">
            <text:p>0.0769230769</text:p>
          </table:table-cell>
          <table:table-cell table:formula="of:=1/[.O1]" office:value-type="float" office:value="0.0714285714285714">
            <text:p>0.0714285714</text:p>
          </table:table-cell>
          <table:table-cell table:formula="of:=1/[.P1]" office:value-type="float" office:value="0.0666666666666667">
            <text:p>0.0666666667</text:p>
          </table:table-cell>
          <table:table-cell table:formula="of:=1/[.Q1]" office:value-type="float" office:value="0.0625">
            <text:p>0.0625</text:p>
          </table:table-cell>
          <table:table-cell/>
        </table:table-row>
        <table:table-row table:style-name="ro2">
          <table:table-cell office:value-type="string">
            <text:p>y<text:span text:style-name="T1">2</text:span></text:p>
          </table:table-cell>
          <table:table-cell table:formula="of:=SQRT([.B1])" office:value-type="float" office:value="1">
            <text:p>1</text:p>
          </table:table-cell>
          <table:table-cell table:formula="of:=SQRT([.C1])" office:value-type="float" office:value="1.4142135623731">
            <text:p>1.4142135624</text:p>
          </table:table-cell>
          <table:table-cell table:formula="of:=SQRT([.D1])" office:value-type="float" office:value="1.73205080756888">
            <text:p>1.7320508076</text:p>
          </table:table-cell>
          <table:table-cell table:formula="of:=SQRT([.E1])" office:value-type="float" office:value="2">
            <text:p>2</text:p>
          </table:table-cell>
          <table:table-cell table:formula="of:=SQRT([.F1])" office:value-type="float" office:value="2.23606797749979">
            <text:p>2.2360679775</text:p>
          </table:table-cell>
          <table:table-cell table:formula="of:=SQRT([.G1])" office:value-type="float" office:value="2.44948974278318">
            <text:p>2.4494897428</text:p>
          </table:table-cell>
          <table:table-cell table:formula="of:=SQRT([.H1])" office:value-type="float" office:value="2.64575131106459">
            <text:p>2.6457513111</text:p>
          </table:table-cell>
          <table:table-cell table:formula="of:=SQRT([.I1])" office:value-type="float" office:value="2.82842712474619">
            <text:p>2.8284271247</text:p>
          </table:table-cell>
          <table:table-cell table:formula="of:=SQRT([.J1])" office:value-type="float" office:value="3">
            <text:p>3</text:p>
          </table:table-cell>
          <table:table-cell table:formula="of:=SQRT([.K1])" office:value-type="float" office:value="3.16227766016838">
            <text:p>3.1622776602</text:p>
          </table:table-cell>
          <table:table-cell table:formula="of:=SQRT([.L1])" office:value-type="float" office:value="3.3166247903554">
            <text:p>3.3166247904</text:p>
          </table:table-cell>
          <table:table-cell table:formula="of:=SQRT([.M1])" office:value-type="float" office:value="3.46410161513775">
            <text:p>3.4641016151</text:p>
          </table:table-cell>
          <table:table-cell table:formula="of:=SQRT([.N1])" office:value-type="float" office:value="3.60555127546399">
            <text:p>3.6055512755</text:p>
          </table:table-cell>
          <table:table-cell table:formula="of:=SQRT([.O1])" office:value-type="float" office:value="3.74165738677394">
            <text:p>3.7416573868</text:p>
          </table:table-cell>
          <table:table-cell table:formula="of:=SQRT([.P1])" office:value-type="float" office:value="3.87298334620742">
            <text:p>3.8729833462</text:p>
          </table:table-cell>
          <table:table-cell table:formula="of:=SQRT([.Q1])" office:value-type="float" office:value="4">
            <text:p>4</text:p>
          </table:table-cell>
          <table:table-cell/>
        </table:table-row>
        <table:table-row table:style-name="ro1" table:number-rows-repeated="1048572">
          <table:table-cell table:number-columns-repeated="18"/>
        </table:table-row>
        <table:table-row table:style-name="ro1"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2" number:min-integer-digits="1"/>
    </number:number-style>
    <style:style style:name="Default" style:family="table-cell">
      <style:table-cell-properties fo:wrap-option="wrap" loext:vertical-justify="auto" style:vertical-align="top"/>
      <style:paragraph-properties css3t:text-justify="auto"/>
      <style:text-properties style:font-name="PT Astra Sans" fo:font-size="12pt" style:font-name-complex="Noto Sans Devanagari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 loext:vertical-justify="auto" style:vertical-align="middle"/>
      <style:paragraph-properties fo:text-align="center" css3t:text-justify="auto"/>
      <style:text-properties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Стили_20_стрелок_20_1" draw:display-name="Стили стрелок 1" svg:viewBox="0 0 20 30" svg:d="m10 0-10 30h20z"/>
  </office:styles>
  <office:automatic-styles>
    <style:page-layout style:name="Mpm1">
      <style:page-layout-properties fo:margin-top="0.3937in" fo:margin-bottom="0.3937in" fo:margin-left="0.7874in" fo:margin-right="0.3937in" style:writing-mode="lr-tb"/>
      <style:header-style>
        <style:header-footer-properties fo:min-height="0.3929in" fo:margin-left="0in" fo:margin-right="0in" fo:margin-bottom="0.1965in"/>
      </style:header-style>
      <style:footer-style>
        <style:header-footer-properties fo:min-height="0.3937in" fo:margin-left="0in" fo:margin-right="0in" fo:margin-top="0.1575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left="0.7874in" fo:margin-right="0.3937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margin-top="0.3937in" fo:margin-bottom="0.3937in" fo:margin-left="0.3937in" fo:margin-right="0.3937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28">04/28/2026</text:date>, <text:time>12:23:2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footer style:display="false"/>
      <style:footer-lef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6-04-27T12:29:56.271264780</meta:creation-date>
    <dc:title>Таблица</dc:title>
    <meta:generator>LibreOffice/3.3$Win32 LibreOffice_project/330m19$Build-6</meta:generator>
    <meta:editing-duration>PT24M20S</meta:editing-duration>
    <meta:editing-cycles>5</meta:editing-cycles>
    <dc:date>2026-04-28T12:23:22.98</dc:date>
    <meta:document-statistic meta:table-count="4" meta:cell-count="187" meta:object-count="3"/>
    <meta:template xlink:type="simple" xlink:actuate="onRequest" xlink:title="Таблица" xlink:href="../../../../usr/lib/libreoffice/share/template/common/ШАБЛОН_ЭЛЕКТРОННОЙ_ТАБЛИЦЫ_2019-07-22.ots" meta:date="2026-04-27T12:29:56.4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59cm" svg:y="4.201cm" style:legend-expansion="high" chart:style-name="ch2"/>
        <chart:plot-area chart:style-name="ch3" svg:x="0.32cm" svg:y="0.18cm" svg:width="13.519cm" svg:height="8.64cm">
          <chart:coordinate-region svg:x="0.617cm" svg:y="0.379cm" svg:width="12.981cm" svg:height="7.794cm"/>
          <chart:axis chart:dimension="x" chart:name="primary-x" chart:style-name="ch4" chartooo:axis-type="auto">
            <chart:categories table:cell-range-address="'формула 1'.B1:'формула 1'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формула 1'.B2:'формула 1'.H2" chart:label-cell-address="'формула 1'.A2:'формула 1'.A2" chart:class="chart:scatter">
            <chart:domain table:cell-range-address="'формула 1'.B1:'формула 1'.H1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-1">
                <text:p>-1</text:p>
                <draw:g>
                  <svg:desc>'формула 1'.B1:'формула 1'.H1</svg:desc>
                </draw:g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f(x)</text:p>
                <draw:g>
                  <svg:desc>'формула 1'.A2:'формула 1'.A2</svg:desc>
                </draw:g>
              </table:table-cell>
              <table:table-cell office:value-type="float" office:value="2">
                <text:p>2</text:p>
                <draw:g>
                  <svg:desc>'формула 1'.B2:'формула 1'.H2</svg:desc>
                </draw:g>
              </table:table-cell>
              <table:table-cell office:value-type="float" office:value="0.3125">
                <text:p>0.3125</text:p>
              </table:table-cell>
              <table:table-cell office:value-type="float" office:value="1">
                <text:p>1</text:p>
              </table:table-cell>
              <table:table-cell office:value-type="float" office:value="1.8125">
                <text:p>1.8125</text:p>
              </table:table-cell>
              <table:table-cell office:value-type="float" office:value="2">
                <text:p>2</text:p>
              </table:table-cell>
              <table:table-cell office:value-type="float" office:value="2.3125">
                <text:p>2.312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93cm" svg:y="3.952cm" style:legend-expansion="high" chart:style-name="ch2"/>
        <chart:plot-area chart:style-name="ch3" svg:x="0.319cm" svg:y="0.206cm" svg:width="13.653cm" svg:height="8.639cm">
          <chart:coordinate-region svg:x="0.616cm" svg:y="0.405cm" svg:width="13.115cm" svg:height="8.241cm"/>
          <chart:axis chart:dimension="x" chart:name="primary-x" chart:style-name="ch4" chartooo:axis-type="auto">
            <chart:categories table:cell-range-address="'формула 2'.B1:'формула 2'.R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формула 2'.B2:'формула 2'.R2" chart:label-cell-address="'формула 2'.A2:'формула 2'.A2" chart:class="chart:scatter">
            <chart:domain table:cell-range-address="'формула 2'.B1:'формула 2'.R1"/>
            <chart:data-point chart:repeated="17"/>
          </chart:series>
          <chart:series chart:style-name="ch7" chart:values-cell-range-address="'формула 2'.B3:'формула 2'.R3" chart:label-cell-address="'формула 2'.A3:'формула 2'.A3" chart:class="chart:scatte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-2">
                <text:p>-2</text:p>
                <draw:g>
                  <svg:desc>'формула 2'.B1:'формула 2'.R1</svg:desc>
                </draw:g>
              </table:table-cell>
              <table:table-cell office:value-type="float" office:value="-1.75">
                <text:p>-1.75</text:p>
              </table:table-cell>
              <table:table-cell office:value-type="float" office:value="-1.5">
                <text:p>-1.5</text:p>
              </table:table-cell>
              <table:table-cell office:value-type="float" office:value="-1.25">
                <text:p>-1.25</text:p>
              </table:table-cell>
              <table:table-cell office:value-type="float" office:value="-1">
                <text:p>-1</text:p>
              </table:table-cell>
              <table:table-cell office:value-type="float" office:value="-0.75">
                <text:p>-0.75</text:p>
              </table:table-cell>
              <table:table-cell office:value-type="float" office:value="-0.5">
                <text:p>-0.5</text:p>
              </table:table-cell>
              <table:table-cell office:value-type="float" office:value="-0.25">
                <text:p>-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1.25">
                <text:p>1.25</text:p>
              </table:table-cell>
              <table:table-cell office:value-type="float" office:value="1.5">
                <text:p>1.5</text:p>
              </table:table-cell>
              <table:table-cell office:value-type="float" office:value="1.75">
                <text:p>1.75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y1</text:p>
                <draw:g>
                  <svg:desc>'формула 2'.A2:'формула 2'.A2</svg:desc>
                </draw:g>
              </table:table-cell>
              <table:table-cell office:value-type="float" office:value="-8">
                <text:p>-8</text:p>
                <draw:g>
                  <svg:desc>'формула 2'.B2:'формула 2'.R2</svg:desc>
                </draw:g>
              </table:table-cell>
              <table:table-cell office:value-type="float" office:value="-5.359375">
                <text:p>-5.359375</text:p>
              </table:table-cell>
              <table:table-cell office:value-type="float" office:value="-3.375">
                <text:p>-3.375</text:p>
              </table:table-cell>
              <table:table-cell office:value-type="float" office:value="-1.953125">
                <text:p>-1.953125</text:p>
              </table:table-cell>
              <table:table-cell office:value-type="float" office:value="-1">
                <text:p>-1</text:p>
              </table:table-cell>
              <table:table-cell office:value-type="float" office:value="-0.421875">
                <text:p>-0.421875</text:p>
              </table:table-cell>
              <table:table-cell office:value-type="float" office:value="-0.125">
                <text:p>-0.125</text:p>
              </table:table-cell>
              <table:table-cell office:value-type="float" office:value="-0.015625">
                <text:p>-0.015625</text:p>
              </table:table-cell>
              <table:table-cell office:value-type="float" office:value="0">
                <text:p>0</text:p>
              </table:table-cell>
              <table:table-cell office:value-type="float" office:value="0.015625">
                <text:p>0.015625</text:p>
              </table:table-cell>
              <table:table-cell office:value-type="float" office:value="0.125">
                <text:p>0.125</text:p>
              </table:table-cell>
              <table:table-cell office:value-type="float" office:value="0.421875">
                <text:p>0.421875</text:p>
              </table:table-cell>
              <table:table-cell office:value-type="float" office:value="1">
                <text:p>1</text:p>
              </table:table-cell>
              <table:table-cell office:value-type="float" office:value="1.953125">
                <text:p>1.953125</text:p>
              </table:table-cell>
              <table:table-cell office:value-type="float" office:value="3.375">
                <text:p>3.375</text:p>
              </table:table-cell>
              <table:table-cell office:value-type="float" office:value="5.359375">
                <text:p>5.3593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y2</text:p>
                <draw:g>
                  <svg:desc>'формула 2'.A3:'формула 2'.A3</svg:desc>
                </draw:g>
              </table:table-cell>
              <table:table-cell office:value-type="float" office:value="3">
                <text:p>3</text:p>
                <draw:g>
                  <svg:desc>'формула 2'.B3:'формула 2'.R3</svg:desc>
                </draw:g>
              </table:table-cell>
              <table:table-cell office:value-type="float" office:value="2.0625">
                <text:p>2.0625</text:p>
              </table:table-cell>
              <table:table-cell office:value-type="float" office:value="1.25">
                <text:p>1.25</text:p>
              </table:table-cell>
              <table:table-cell office:value-type="float" office:value="0.5625">
                <text:p>0.5625</text:p>
              </table:table-cell>
              <table:table-cell office:value-type="float" office:value="0">
                <text:p>0</text:p>
              </table:table-cell>
              <table:table-cell office:value-type="float" office:value="-0.4375">
                <text:p>-0.4375</text:p>
              </table:table-cell>
              <table:table-cell office:value-type="float" office:value="-0.75">
                <text:p>-0.75</text:p>
              </table:table-cell>
              <table:table-cell office:value-type="float" office:value="-0.9375">
                <text:p>-0.9375</text:p>
              </table:table-cell>
              <table:table-cell office:value-type="float" office:value="-1">
                <text:p>-1</text:p>
              </table:table-cell>
              <table:table-cell office:value-type="float" office:value="-0.9375">
                <text:p>-0.9375</text:p>
              </table:table-cell>
              <table:table-cell office:value-type="float" office:value="-0.75">
                <text:p>-0.75</text:p>
              </table:table-cell>
              <table:table-cell office:value-type="float" office:value="-0.4375">
                <text:p>-0.4375</text:p>
              </table:table-cell>
              <table:table-cell office:value-type="float" office:value="0">
                <text:p>0</text:p>
              </table:table-cell>
              <table:table-cell office:value-type="float" office:value="0.5625">
                <text:p>0.5625</text:p>
              </table:table-cell>
              <table:table-cell office:value-type="float" office:value="1.25">
                <text:p>1.25</text:p>
              </table:table-cell>
              <table:table-cell office:value-type="float" office:value="2.0625">
                <text:p>2.062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93cm" svg:y="3.952cm" style:legend-expansion="high" chart:style-name="ch2"/>
        <chart:plot-area chart:style-name="ch3" svg:x="0.32cm" svg:y="0.18cm" svg:width="13.653cm" svg:height="8.64cm">
          <chart:coordinate-region svg:x="0.474cm" svg:y="0.379cm" svg:width="13.402cm" svg:height="8.242cm"/>
          <chart:axis chart:dimension="x" chart:name="primary-x" chart:style-name="ch4" chartooo:axis-type="auto">
            <chart:categories table:cell-range-address="'формула 3 часть 1'.B1:'формула 3 часть 1'.V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формула 3 часть 1'.B2:'формула 3 часть 1'.V2" chart:label-cell-address="'формула 3 часть 1'.A2:'формула 3 часть 1'.A2" chart:class="chart:scatter">
            <chart:domain table:cell-range-address="'формула 3 часть 1'.B1:'формула 3 часть 1'.V1"/>
            <chart:data-point chart:repeated="21"/>
          </chart:series>
          <chart:series chart:style-name="ch7" chart:values-cell-range-address="'формула 3 часть 1'.B3:'формула 3 часть 1'.V3" chart:label-cell-address="'формула 3 часть 1'.A3:'формула 3 часть 1'.A3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float" office:value="-5">
                <text:p>-5</text:p>
                <draw:g>
                  <svg:desc>'формула 3 часть 1'.B1:'формула 3 часть 1'.V1</svg:desc>
                </draw:g>
              </table:table-cell>
              <table:table-cell office:value-type="float" office:value="-4.5">
                <text:p>-4.5</text:p>
              </table:table-cell>
              <table:table-cell office:value-type="float" office:value="-4">
                <text:p>-4</text:p>
              </table:table-cell>
              <table:table-cell office:value-type="float" office:value="-3.5">
                <text:p>-3.5</text:p>
              </table:table-cell>
              <table:table-cell office:value-type="float" office:value="-3">
                <text:p>-3</text:p>
              </table:table-cell>
              <table:table-cell office:value-type="float" office:value="-2.5">
                <text:p>-2.5</text:p>
              </table:table-cell>
              <table:table-cell office:value-type="float" office:value="-2">
                <text:p>-2</text:p>
              </table:table-cell>
              <table:table-cell office:value-type="float" office:value="-1.5">
                <text:p>-1.5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y1</text:p>
                <draw:g>
                  <svg:desc>'формула 3 часть 1'.A2:'формула 3 часть 1'.A2</svg:desc>
                </draw:g>
              </table:table-cell>
              <table:table-cell office:value-type="float" office:value="0.54402111088937">
                <text:p>0.54402111088937</text:p>
                <draw:g>
                  <svg:desc>'формула 3 часть 1'.B2:'формула 3 часть 1'.V2</svg:desc>
                </draw:g>
              </table:table-cell>
              <table:table-cell office:value-type="float" office:value="-0.412118485241757">
                <text:p>-0.412118485241757</text:p>
              </table:table-cell>
              <table:table-cell office:value-type="float" office:value="-0.989358246623382">
                <text:p>-0.989358246623382</text:p>
              </table:table-cell>
              <table:table-cell office:value-type="float" office:value="-0.656986598718789">
                <text:p>-0.656986598718789</text:p>
              </table:table-cell>
              <table:table-cell office:value-type="float" office:value="0.279415498198926">
                <text:p>0.279415498198926</text:p>
              </table:table-cell>
              <table:table-cell office:value-type="float" office:value="0.958924274663139">
                <text:p>0.958924274663139</text:p>
              </table:table-cell>
              <table:table-cell office:value-type="float" office:value="0.756802495307928">
                <text:p>0.756802495307928</text:p>
              </table:table-cell>
              <table:table-cell office:value-type="float" office:value="-0.141120008059867">
                <text:p>-0.141120008059867</text:p>
              </table:table-cell>
              <table:table-cell office:value-type="float" office:value="-0.909297426825682">
                <text:p>-0.909297426825682</text:p>
              </table:table-cell>
              <table:table-cell office:value-type="float" office:value="-0.841470984807897">
                <text:p>-0.841470984807897</text:p>
              </table:table-cell>
              <table:table-cell office:value-type="float" office:value="0">
                <text:p>0</text:p>
              </table:table-cell>
              <table:table-cell office:value-type="float" office:value="0.841470984807897">
                <text:p>0.841470984807897</text:p>
              </table:table-cell>
              <table:table-cell office:value-type="float" office:value="0.909297426825682">
                <text:p>0.909297426825682</text:p>
              </table:table-cell>
              <table:table-cell office:value-type="float" office:value="0.141120008059867">
                <text:p>0.141120008059867</text:p>
              </table:table-cell>
              <table:table-cell office:value-type="float" office:value="-0.756802495307928">
                <text:p>-0.756802495307928</text:p>
              </table:table-cell>
              <table:table-cell office:value-type="float" office:value="-0.958924274663139">
                <text:p>-0.958924274663139</text:p>
              </table:table-cell>
              <table:table-cell office:value-type="float" office:value="-0.279415498198926">
                <text:p>-0.279415498198926</text:p>
              </table:table-cell>
              <table:table-cell office:value-type="float" office:value="0.656986598718789">
                <text:p>0.656986598718789</text:p>
              </table:table-cell>
              <table:table-cell office:value-type="float" office:value="0.989358246623382">
                <text:p>0.989358246623382</text:p>
              </table:table-cell>
              <table:table-cell office:value-type="float" office:value="0.412118485241757">
                <text:p>0.412118485241757</text:p>
              </table:table-cell>
              <table:table-cell office:value-type="float" office:value="-0.54402111088937">
                <text:p>-0.54402111088937</text:p>
              </table:table-cell>
            </table:table-row>
            <table:table-row>
              <table:table-cell office:value-type="string">
                <text:p>y2</text:p>
                <draw:g>
                  <svg:desc>'формула 3 часть 1'.A3:'формула 3 часть 1'.A3</svg:desc>
                </draw:g>
              </table:table-cell>
              <table:table-cell office:value-type="float" office:value="-0.759687912858821">
                <text:p>-0.759687912858821</text:p>
                <draw:g>
                  <svg:desc>'формула 3 часть 1'.B3:'формула 3 часть 1'.V3</svg:desc>
                </draw:g>
              </table:table-cell>
              <table:table-cell office:value-type="float" office:value="0.594920663309892">
                <text:p>0.594920663309892</text:p>
              </table:table-cell>
              <table:table-cell office:value-type="float" office:value="0.843853958732492">
                <text:p>0.843853958732492</text:p>
              </table:table-cell>
              <table:table-cell office:value-type="float" office:value="-0.475536927995993">
                <text:p>-0.475536927995993</text:p>
              </table:table-cell>
              <table:table-cell office:value-type="float" office:value="-0.911130261884677">
                <text:p>-0.911130261884677</text:p>
              </table:table-cell>
              <table:table-cell office:value-type="float" office:value="0.346635317835026">
                <text:p>0.346635317835026</text:p>
              </table:table-cell>
              <table:table-cell office:value-type="float" office:value="0.960170286650366">
                <text:p>0.960170286650366</text:p>
              </table:table-cell>
              <table:table-cell office:value-type="float" office:value="-0.21079579943078">
                <text:p>-0.21079579943078</text:p>
              </table:table-cell>
              <table:table-cell office:value-type="float" office:value="-0.989992496600445">
                <text:p>-0.989992496600445</text:p>
              </table:table-cell>
              <table:table-cell office:value-type="float" office:value="0.0707372016677029">
                <text:p>0.0707372016677029</text:p>
              </table:table-cell>
              <table:table-cell office:value-type="float" office:value="1">
                <text:p>1</text:p>
              </table:table-cell>
              <table:table-cell office:value-type="float" office:value="0.0707372016677029">
                <text:p>0.0707372016677029</text:p>
              </table:table-cell>
              <table:table-cell office:value-type="float" office:value="-0.989992496600445">
                <text:p>-0.989992496600445</text:p>
              </table:table-cell>
              <table:table-cell office:value-type="float" office:value="-0.21079579943078">
                <text:p>-0.21079579943078</text:p>
              </table:table-cell>
              <table:table-cell office:value-type="float" office:value="0.960170286650366">
                <text:p>0.960170286650366</text:p>
              </table:table-cell>
              <table:table-cell office:value-type="float" office:value="0.346635317835026">
                <text:p>0.346635317835026</text:p>
              </table:table-cell>
              <table:table-cell office:value-type="float" office:value="-0.911130261884677">
                <text:p>-0.911130261884677</text:p>
              </table:table-cell>
              <table:table-cell office:value-type="float" office:value="-0.475536927995993">
                <text:p>-0.475536927995993</text:p>
              </table:table-cell>
              <table:table-cell office:value-type="float" office:value="0.843853958732492">
                <text:p>0.843853958732492</text:p>
              </table:table-cell>
              <table:table-cell office:value-type="float" office:value="0.594920663309892">
                <text:p>0.594920663309892</text:p>
              </table:table-cell>
              <table:table-cell office:value-type="float" office:value="-0.759687912858821">
                <text:p>-0.7596879128588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