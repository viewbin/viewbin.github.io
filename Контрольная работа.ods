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 grddl:transformation="http://docs.oasis-open.org/office/1.2/xslt/odf2rdf.xsl">
  <office:scripts/>
  <office:font-face-decls>
    <style:font-face style:name="PS Astra Sans" svg:font-family="'PS Astr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T Astra Sans1" svg:font-family="'PT Astra Sans'" style:font-family-generic="swiss" style:font-pitch="variable"/>
    <style:font-face style:name="PT Astra Sans" svg:font-family="'PT Astra Sans'" style:font-adornments="Обычный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52in"/>
    </style:style>
    <style:style style:name="co2" style:family="table-column">
      <style:table-column-properties fo:break-before="auto" style:column-width="1.2634in"/>
    </style:style>
    <style:style style:name="co3" style:family="table-column">
      <style:table-column-properties fo:break-before="auto" style:column-width="0.911in"/>
    </style:style>
    <style:style style:name="co4" style:family="table-column">
      <style:table-column-properties fo:break-before="auto" style:column-width="1.2319in"/>
    </style:style>
    <style:style style:name="co5" style:family="table-column">
      <style:table-column-properties fo:break-before="auto" style:column-width="1.2016in"/>
    </style:style>
    <style:style style:name="co6" style:family="table-column">
      <style:table-column-properties fo:break-before="auto" style:column-width="1.2366in"/>
    </style:style>
    <style:style style:name="co7" style:family="table-column">
      <style:table-column-properties fo:break-before="auto" style:column-width="0.9307in"/>
    </style:style>
    <style:style style:name="co8" style:family="table-column">
      <style:table-column-properties fo:break-before="auto" style:column-width="0.81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0236in"/>
    </style:style>
    <style:style style:name="co11" style:family="table-column">
      <style:table-column-properties fo:break-before="auto" style:column-width="1.2764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2217in" fo:break-before="auto" style:use-optimal-row-height="true"/>
    </style:style>
    <style:style style:name="ro2" style:family="table-row">
      <style:table-row-properties style:row-height="0.7772in" fo:break-before="auto" style:use-optimal-row-height="true"/>
    </style:style>
    <style:style style:name="ro3" style:family="table-row">
      <style:table-row-properties style:row-height="0.2228in" fo:break-before="auto" style:use-optimal-row-height="true"/>
    </style:style>
    <style:style style:name="ro4" style:family="table-row">
      <style:table-row-properties style:row-height="0.2327in" fo:break-before="auto" style:use-optimal-row-height="true"/>
    </style:style>
    <style:style style:name="ro5" style:family="table-row">
      <style:table-row-properties style:row-height="0.2484in" fo:break-before="auto" style:use-optimal-row-height="true"/>
    </style:style>
    <style:style style:name="ro6" style:family="table-row">
      <style:table-row-properties style:row-height="0.1882in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008in solid #000000" fo:padding-bottom="0.0193in" fo:padding-left="0.0138in" fo:padding-right="0.0138in" fo:padding-top="0.0193in"/>
      <style:text-properties style:use-window-font-color="true" style:text-outline="false" style:text-line-through-styl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ackground-color="#c0c0c0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/>
    </style:style>
    <style:style style:name="ce5" style:family="table-cell" style:parent-style-name="Default">
      <style:table-cell-properties fo:border="0.0008in solid #000000"/>
      <style:text-properties style:use-window-font-color="true" style:text-outline="false" style:text-line-through-styl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0c0c0" fo:border="0.0008in solid #000000" fo:padding-bottom="0.0193in" fo:padding-left="0.0138in" fo:padding-right="0.0138in" fo:padding-top="0.0193in"/>
    </style:style>
    <style:style style:name="ce7" style:family="table-cell" style:parent-style-name="Default">
      <style:text-properties style:use-window-font-color="true" style:text-outline="false" style:text-line-through-styl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008in solid #000000"/>
      <style:text-properties style:font-name-asian="Lucida Sans Unicode"/>
    </style:style>
    <style:style style:name="ce9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style:use-window-font-color="true" style:text-outline="false" style:text-line-through-style="none" style:font-name="PT Astra Sans1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0c0c0" fo:border="0.0008in solid #000000" fo:padding-bottom="0.0193in" fo:padding-left="0.0138in" fo:padding-right="0.0138in" fo:padding-top="0.0193in"/>
      <style:text-properties style:use-window-font-color="true" style:text-outline="false" style:text-line-through-styl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102in solid #000000"/>
      <style:text-properties style:use-window-font-color="true" style:text-outline="false" style:text-line-through-styl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102in solid #000000"/>
    </style:style>
    <style:style style:name="ce14" style:family="table-cell" style:parent-style-name="Default">
      <style:table-cell-properties fo:border="0.0102in solid #000000"/>
      <style:text-properties style:font-name="PS Astra Sans" fo:font-size="10pt" style:font-name-complex="Tahoma"/>
    </style:style>
    <style:style style:name="ce15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1" style:family="text">
      <style:text-properties style:text-position="-33% 58%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-33% 58%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табл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2"/>
          <table:table-cell table:style-name="ce3" table:number-columns-repeated="9"/>
        </table:table-row>
        <table:table-row table:style-name="ro2">
          <table:table-cell table:style-name="ce1" office:value-type="string">
            <text:p>№</text:p>
          </table:table-cell>
          <table:table-cell table:style-name="ce1" office:value-type="string">
            <text:p>Ф.И.О.</text:p>
          </table:table-cell>
          <table:table-cell table:style-name="ce6" office:value-type="string">
            <text:p>тариф</text:p>
          </table:table-cell>
          <table:table-cell table:style-name="ce6" office:value-type="string">
            <text:p>Отработано</text:p>
          </table:table-cell>
          <table:table-cell table:style-name="ce6" office:value-type="string">
            <text:p>Зарплата </text:p>
          </table:table-cell>
          <table:table-cell table:style-name="ce6" office:value-type="string">
            <text:p>Зарплата с</text:p>
            <text:p>уч.РК и</text:p>
            <text:p>сев.надб.</text:p>
            <text:p>(1,5)</text:p>
          </table:table-cell>
          <table:table-cell table:style-name="ce6" office:value-type="string">
            <text:p>Зарплата с</text:p>
            <text:p>учетом</text:p>
            <text:p>НДФЛ</text:p>
            <text:p>(13%)</text:p>
          </table:table-cell>
          <table:table-cell table:style-name="ce6" office:value-type="string">
            <text:p>Отработано</text:p>
            <text:p>(ч)</text:p>
          </table:table-cell>
          <table:table-cell table:style-name="ce6" office:value-type="string">
            <text:p>Зарплата</text:p>
            <text:p>(Т*Ч)</text:p>
          </table:table-cell>
          <table:table-cell table:style-name="ce11" office:value-type="string">
            <text:p>Зарплата с уч.РК и сев.надб. (1,5) </text:p>
          </table:table-cell>
          <table:table-cell table:style-name="ce6" office:value-type="string">
            <text:p>Зарплата с</text:p>
            <text:p>учетом</text:p>
            <text:p>НДФЛ</text:p>
            <text:p>(13%)</text:p>
          </table:table-cell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string">
            <text:p>Иванов А.П.</text:p>
          </table:table-cell>
          <table:table-cell table:style-name="ce7" office:value-type="float" office:value="2.78">
            <text:p>2.78</text:p>
          </table:table-cell>
          <table:table-cell table:style-name="ce2" office:value-type="float" office:value="175">
            <text:p>175</text:p>
          </table:table-cell>
          <table:table-cell table:style-name="ce9" table:formula="of:=[.C3]*[.D3]" office:value-type="float" office:value="486.5">
            <text:p>486.5</text:p>
          </table:table-cell>
          <table:table-cell table:style-name="ce10" table:formula="of:=[.E3] * 1.5" office:value-type="float" office:value="729.75">
            <text:p>729.75</text:p>
          </table:table-cell>
          <table:table-cell table:style-name="ce2" table:formula="of:=[.F3] * 0.87" office:value-type="float" office:value="634.8825">
            <text:p>634.8825</text:p>
          </table:table-cell>
          <table:table-cell table:style-name="ce9" office:value-type="float" office:value="143">
            <text:p>143</text:p>
          </table:table-cell>
          <table:table-cell table:style-name="ce2" table:formula="of:=[.C3]*[.H3]" office:value-type="float" office:value="397.54">
            <text:p>397.54</text:p>
          </table:table-cell>
          <table:table-cell table:style-name="ce2" table:formula="of:=[.I3] * 1.5" office:value-type="float" office:value="596.31">
            <text:p>596.31</text:p>
          </table:table-cell>
          <table:table-cell table:style-name="ce2" table:formula="of:=[.J3] * 0.87" office:value-type="float" office:value="518.7897">
            <text:p>518.7897</text:p>
          </table:table-cell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5" office:value-type="string">
            <text:p>Кузьмин Н.В</text:p>
          </table:table-cell>
          <table:table-cell table:style-name="ce7" office:value-type="float" office:value="2.95">
            <text:p>2.95</text:p>
          </table:table-cell>
          <table:table-cell table:style-name="ce2" office:value-type="float" office:value="175">
            <text:p>175</text:p>
          </table:table-cell>
          <table:table-cell table:style-name="ce9" table:formula="of:=[.C4]*[.D4]" office:value-type="float" office:value="516.25">
            <text:p>516.25</text:p>
          </table:table-cell>
          <table:table-cell table:style-name="ce10" table:formula="of:=[.E4] * 1.5" office:value-type="float" office:value="774.375">
            <text:p>774.375</text:p>
          </table:table-cell>
          <table:table-cell table:style-name="ce2" table:formula="of:=[.F4] * 0.87" office:value-type="float" office:value="673.70625">
            <text:p>673.70625</text:p>
          </table:table-cell>
          <table:table-cell table:style-name="ce7" office:value-type="float" office:value="130">
            <text:p>130</text:p>
          </table:table-cell>
          <table:table-cell table:style-name="ce2" table:formula="of:=[.C4]*[.H4]" office:value-type="float" office:value="383.5">
            <text:p>383.5</text:p>
          </table:table-cell>
          <table:table-cell table:style-name="ce2" table:formula="of:=[.I4] * 1.5" office:value-type="float" office:value="575.25">
            <text:p>575.25</text:p>
          </table:table-cell>
          <table:table-cell table:style-name="ce2" table:formula="of:=[.J4] * 0.87" office:value-type="float" office:value="500.4675">
            <text:p>500.4675</text:p>
          </table:table-cell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2" office:value-type="string">
            <text:p>Зверев А.В. </text:p>
          </table:table-cell>
          <table:table-cell table:style-name="ce7" office:value-type="float" office:value="3.5">
            <text:p>3.5</text:p>
          </table:table-cell>
          <table:table-cell table:style-name="ce9" office:value-type="float" office:value="150">
            <text:p>150</text:p>
          </table:table-cell>
          <table:table-cell table:style-name="ce9" table:formula="of:=[.C5]*[.D5]" office:value-type="float" office:value="525">
            <text:p>525</text:p>
          </table:table-cell>
          <table:table-cell table:style-name="ce10" table:formula="of:=[.E5] * 1.5" office:value-type="float" office:value="787.5">
            <text:p>787.5</text:p>
          </table:table-cell>
          <table:table-cell table:style-name="ce2" table:formula="of:=[.F5] * 0.87" office:value-type="float" office:value="685.125">
            <text:p>685.125</text:p>
          </table:table-cell>
          <table:table-cell table:style-name="ce2" office:value-type="float" office:value="125">
            <text:p>125</text:p>
          </table:table-cell>
          <table:table-cell table:style-name="ce2" table:formula="of:=[.C5]*[.H5]" office:value-type="float" office:value="437.5">
            <text:p>437.5</text:p>
          </table:table-cell>
          <table:table-cell table:style-name="ce2" table:formula="of:=[.I5] * 1.5" office:value-type="float" office:value="656.25">
            <text:p>656.25</text:p>
          </table:table-cell>
          <table:table-cell table:style-name="ce2" table:formula="of:=[.J5] * 0.87" office:value-type="float" office:value="570.9375">
            <text:p>570.9375</text:p>
          </table:table-cell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2" office:value-type="string">
            <text:p>Сидоров А.К. </text:p>
          </table:table-cell>
          <table:table-cell table:style-name="ce7" office:value-type="float" office:value="3.15">
            <text:p>3.15</text:p>
          </table:table-cell>
          <table:table-cell table:style-name="ce2" office:value-type="float" office:value="140">
            <text:p>140</text:p>
          </table:table-cell>
          <table:table-cell table:style-name="ce9" table:formula="of:=[.C6]*[.D6]" office:value-type="float" office:value="441">
            <text:p>441</text:p>
          </table:table-cell>
          <table:table-cell table:style-name="ce10" table:formula="of:=[.E6] * 1.5" office:value-type="float" office:value="661.5">
            <text:p>661.5</text:p>
          </table:table-cell>
          <table:table-cell table:style-name="ce2" table:formula="of:=[.F6] * 0.87" office:value-type="float" office:value="575.505">
            <text:p>575.505</text:p>
          </table:table-cell>
          <table:table-cell table:style-name="ce9" office:value-type="float" office:value="143">
            <text:p>143</text:p>
          </table:table-cell>
          <table:table-cell table:style-name="ce2" table:formula="of:=[.C6]*[.H6]" office:value-type="float" office:value="450.45">
            <text:p>450.45</text:p>
          </table:table-cell>
          <table:table-cell table:style-name="ce2" table:formula="of:=[.I6] * 1.5" office:value-type="float" office:value="675.675">
            <text:p>675.675</text:p>
          </table:table-cell>
          <table:table-cell table:style-name="ce2" table:formula="of:=[.J6] * 0.87" office:value-type="float" office:value="587.83725">
            <text:p>587.83725</text:p>
          </table:table-cell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2" office:value-type="string">
            <text:p>Кузнецов В.А.</text:p>
          </table:table-cell>
          <table:table-cell table:style-name="ce7" office:value-type="float" office:value="2.78">
            <text:p>2.78</text:p>
          </table:table-cell>
          <table:table-cell table:style-name="ce2" office:value-type="float" office:value="175">
            <text:p>175</text:p>
          </table:table-cell>
          <table:table-cell table:style-name="ce9" table:formula="of:=[.C7]*[.D7]" office:value-type="float" office:value="486.5">
            <text:p>486.5</text:p>
          </table:table-cell>
          <table:table-cell table:style-name="ce10" table:formula="of:=[.E7] * 1.5" office:value-type="float" office:value="729.75">
            <text:p>729.75</text:p>
          </table:table-cell>
          <table:table-cell table:style-name="ce2" table:formula="of:=[.F7] * 0.87" office:value-type="float" office:value="634.8825">
            <text:p>634.8825</text:p>
          </table:table-cell>
          <table:table-cell table:style-name="ce2" office:value-type="float" office:value="151">
            <text:p>151</text:p>
          </table:table-cell>
          <table:table-cell table:style-name="ce2" table:formula="of:=[.C7]*[.H7]" office:value-type="float" office:value="419.78">
            <text:p>419.78</text:p>
          </table:table-cell>
          <table:table-cell table:style-name="ce2" table:formula="of:=[.I7] * 1.5" office:value-type="float" office:value="629.67">
            <text:p>629.67</text:p>
          </table:table-cell>
          <table:table-cell table:style-name="ce2" table:formula="of:=[.J7] * 0.87" office:value-type="float" office:value="547.8129">
            <text:p>547.8129</text:p>
          </table:table-cell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3" office:value-type="string">
            <text:p>Ренуев В.С.</text:p>
          </table:table-cell>
          <table:table-cell table:style-name="ce7" office:value-type="float" office:value="3.5">
            <text:p>3.5</text:p>
          </table:table-cell>
          <table:table-cell table:style-name="ce3" office:value-type="float" office:value="180">
            <text:p>180</text:p>
          </table:table-cell>
          <table:table-cell table:style-name="ce9" table:formula="of:=[.C8]*[.D8]" office:value-type="float" office:value="630">
            <text:p>630</text:p>
          </table:table-cell>
          <table:table-cell table:style-name="ce10" table:formula="of:=[.E8] * 1.5" office:value-type="float" office:value="945">
            <text:p>945</text:p>
          </table:table-cell>
          <table:table-cell table:style-name="ce2" table:formula="of:=[.F8] * 0.87" office:value-type="float" office:value="822.15">
            <text:p>822.15</text:p>
          </table:table-cell>
          <table:table-cell table:style-name="ce3" office:value-type="float" office:value="130">
            <text:p>130</text:p>
          </table:table-cell>
          <table:table-cell table:style-name="ce2" table:formula="of:=[.C8]*[.H8]" office:value-type="float" office:value="455">
            <text:p>455</text:p>
          </table:table-cell>
          <table:table-cell table:style-name="ce2" table:formula="of:=[.I8] * 1.5" office:value-type="float" office:value="682.5">
            <text:p>682.5</text:p>
          </table:table-cell>
          <table:table-cell table:style-name="ce2" table:formula="of:=[.J8] * 0.87" office:value-type="float" office:value="593.775">
            <text:p>593.775</text:p>
          </table:table-cell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3" office:value-type="string">
            <text:p>Боринский В.Н</text:p>
          </table:table-cell>
          <table:table-cell table:style-name="ce7" office:value-type="float" office:value="3.3">
            <text:p>3.3</text:p>
          </table:table-cell>
          <table:table-cell table:style-name="ce3" office:value-type="float" office:value="160">
            <text:p>160</text:p>
          </table:table-cell>
          <table:table-cell table:style-name="ce9" table:formula="of:=[.C9]*[.D9]" office:value-type="float" office:value="528">
            <text:p>528</text:p>
          </table:table-cell>
          <table:table-cell table:style-name="ce10" table:formula="of:=[.E9] * 1.5" office:value-type="float" office:value="792">
            <text:p>792</text:p>
          </table:table-cell>
          <table:table-cell table:style-name="ce2" table:formula="of:=[.F9] * 0.87" office:value-type="float" office:value="689.04">
            <text:p>689.04</text:p>
          </table:table-cell>
          <table:table-cell table:style-name="ce3" office:value-type="float" office:value="143">
            <text:p>143</text:p>
          </table:table-cell>
          <table:table-cell table:style-name="ce2" table:formula="of:=[.C9]*[.H9]" office:value-type="float" office:value="471.9">
            <text:p>471.9</text:p>
          </table:table-cell>
          <table:table-cell table:style-name="ce2" table:formula="of:=[.I9] * 1.5" office:value-type="float" office:value="707.85">
            <text:p>707.85</text:p>
          </table:table-cell>
          <table:table-cell table:style-name="ce2" table:formula="of:=[.J9] * 0.87" office:value-type="float" office:value="615.8295">
            <text:p>615.8295</text:p>
          </table:table-cell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3" office:value-type="string">
            <text:p>Антохин В.А.</text:p>
          </table:table-cell>
          <table:table-cell table:style-name="ce7" office:value-type="float" office:value="2.95">
            <text:p>2.95</text:p>
          </table:table-cell>
          <table:table-cell table:style-name="ce3" office:value-type="float" office:value="152">
            <text:p>152</text:p>
          </table:table-cell>
          <table:table-cell table:style-name="ce9" table:formula="of:=[.C10]*[.D10]" office:value-type="float" office:value="448.4">
            <text:p>448.4</text:p>
          </table:table-cell>
          <table:table-cell table:style-name="ce10" table:formula="of:=[.E10] * 1.5" office:value-type="float" office:value="672.6">
            <text:p>672.6</text:p>
          </table:table-cell>
          <table:table-cell table:style-name="ce2" table:formula="of:=[.F10] * 0.87" office:value-type="float" office:value="585.162">
            <text:p>585.162</text:p>
          </table:table-cell>
          <table:table-cell table:style-name="ce3" office:value-type="float" office:value="151">
            <text:p>151</text:p>
          </table:table-cell>
          <table:table-cell table:style-name="ce2" table:formula="of:=[.C10]*[.H10]" office:value-type="float" office:value="445.45">
            <text:p>445.45</text:p>
          </table:table-cell>
          <table:table-cell table:style-name="ce2" table:formula="of:=[.I10] * 1.5" office:value-type="float" office:value="668.175">
            <text:p>668.175</text:p>
          </table:table-cell>
          <table:table-cell table:style-name="ce2" table:formula="of:=[.J10] * 0.87" office:value-type="float" office:value="581.31225">
            <text:p>581.31225</text:p>
          </table:table-cell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3" office:value-type="string">
            <text:p>Шевченко П.И</text:p>
          </table:table-cell>
          <table:table-cell table:style-name="ce3" office:value-type="float" office:value="3.15">
            <text:p>3.15</text:p>
          </table:table-cell>
          <table:table-cell table:style-name="ce3" office:value-type="float" office:value="175">
            <text:p>175</text:p>
          </table:table-cell>
          <table:table-cell table:style-name="ce9" table:formula="of:=[.C11]*[.D11]" office:value-type="float" office:value="551.25">
            <text:p>551.25</text:p>
          </table:table-cell>
          <table:table-cell table:style-name="ce10" table:formula="of:=[.E11] * 1.5" office:value-type="float" office:value="826.875">
            <text:p>826.875</text:p>
          </table:table-cell>
          <table:table-cell table:style-name="ce2" table:formula="of:=[.F11] * 0.87" office:value-type="float" office:value="719.38125">
            <text:p>719.38125</text:p>
          </table:table-cell>
          <table:table-cell table:style-name="ce7" office:value-type="float" office:value="130">
            <text:p>130</text:p>
          </table:table-cell>
          <table:table-cell table:style-name="ce2" table:formula="of:=[.C11]*[.H11]" office:value-type="float" office:value="409.5">
            <text:p>409.5</text:p>
          </table:table-cell>
          <table:table-cell table:style-name="ce2" table:formula="of:=[.I11] * 1.5" office:value-type="float" office:value="614.25">
            <text:p>614.25</text:p>
          </table:table-cell>
          <table:table-cell table:style-name="ce2" table:formula="of:=[.J11] * 0.87" office:value-type="float" office:value="534.3975">
            <text:p>534.3975</text:p>
          </table:table-cell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3" office:value-type="string">
            <text:p>Тирских А.В.</text:p>
          </table:table-cell>
          <table:table-cell table:style-name="ce8" office:value-type="float" office:value="3.5">
            <text:p>3.5</text:p>
          </table:table-cell>
          <table:table-cell table:style-name="ce3" office:value-type="float" office:value="175">
            <text:p>175</text:p>
          </table:table-cell>
          <table:table-cell table:style-name="ce9" table:formula="of:=[.C12]*[.D12]" office:value-type="float" office:value="612.5">
            <text:p>612.5</text:p>
          </table:table-cell>
          <table:table-cell table:style-name="ce10" table:formula="of:=[.E12] * 1.5" office:value-type="float" office:value="918.75">
            <text:p>918.75</text:p>
          </table:table-cell>
          <table:table-cell table:style-name="ce2" table:formula="of:=[.F12] * 0.87" office:value-type="float" office:value="799.3125">
            <text:p>799.3125</text:p>
          </table:table-cell>
          <table:table-cell table:style-name="ce3" office:value-type="float" office:value="125">
            <text:p>125</text:p>
          </table:table-cell>
          <table:table-cell table:style-name="ce2" table:formula="of:=[.C12]*[.H12]" office:value-type="float" office:value="437.5">
            <text:p>437.5</text:p>
          </table:table-cell>
          <table:table-cell table:style-name="ce2" table:formula="of:=[.I12] * 1.5" office:value-type="float" office:value="656.25">
            <text:p>656.25</text:p>
          </table:table-cell>
          <table:table-cell table:style-name="ce2" table:formula="of:=[.J12] * 0.87" office:value-type="float" office:value="570.9375">
            <text:p>570.9375</text:p>
          </table:table-cell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5" office:value-type="string">
            <text:p>Шарапов И.П </text:p>
          </table:table-cell>
          <table:table-cell table:style-name="ce3" office:value-type="float" office:value="2.78">
            <text:p>2.78</text:p>
          </table:table-cell>
          <table:table-cell table:style-name="ce3" office:value-type="float" office:value="160">
            <text:p>160</text:p>
          </table:table-cell>
          <table:table-cell table:style-name="ce9" table:formula="of:=[.C13]*[.D13]" office:value-type="float" office:value="444.8">
            <text:p>444.8</text:p>
          </table:table-cell>
          <table:table-cell table:style-name="ce10" table:formula="of:=[.E13] * 1.5" office:value-type="float" office:value="667.2">
            <text:p>667.2</text:p>
          </table:table-cell>
          <table:table-cell table:style-name="ce2" table:formula="of:=[.F13] * 0.87" office:value-type="float" office:value="580.464">
            <text:p>580.464</text:p>
          </table:table-cell>
          <table:table-cell table:style-name="ce3" office:value-type="float" office:value="143">
            <text:p>143</text:p>
          </table:table-cell>
          <table:table-cell table:style-name="ce2" table:formula="of:=[.C13]*[.H13]" office:value-type="float" office:value="397.54">
            <text:p>397.54</text:p>
          </table:table-cell>
          <table:table-cell table:style-name="ce2" table:formula="of:=[.I13] * 1.5" office:value-type="float" office:value="596.31">
            <text:p>596.31</text:p>
          </table:table-cell>
          <table:table-cell table:style-name="ce2" table:formula="of:=[.J13] * 0.87" office:value-type="float" office:value="518.7897">
            <text:p>518.7897</text:p>
          </table:table-cell>
        </table:table-row>
        <table:table-row table:style-name="ro4">
          <table:table-cell table:style-name="ce4" office:value-type="string" table:number-columns-spanned="3" table:number-rows-spanned="1">
            <text:p>итого</text:p>
          </table:table-cell>
          <table:covered-table-cell table:number-columns-repeated="2" table:style-name="ce3"/>
          <table:table-cell table:style-name="ce3" table:number-columns-repeated="8"/>
        </table:table-row>
        <table:table-row table:style-name="ro1" table:number-rows-repeated="4">
          <table:table-cell table:number-columns-repeated="11"/>
        </table:table-row>
        <table:table-row table:style-name="ro1">
          <table:table-cell>
            <draw:frame table:end-cell-address="табл1.G35" table:end-x="0.0488in" table:end-y="0.2102in" draw:z-index="0" draw:style-name="gr1" svg:width="6.2988in" svg:height="3.5429in" svg:x="0.5937in" svg:y="0.1984in">
              <draw:object draw:notify-on-update-of-ranges="табл1.B3:табл1.B3 табл1.B4:табл1.B13 табл1.G3:табл1.G3 табл1.G4:табл1.G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table:number-columns-repeated="6"/>
          <table:table-cell>
            <draw:frame table:end-cell-address="табл1.M36" table:end-x="0.5531in" table:end-y="0.0413in" draw:z-index="1" draw:style-name="gr1" svg:width="6.2988in" svg:height="3.5429in" svg:x="0.0555in" svg:y="0.0295in">
              <draw:object draw:notify-on-update-of-ranges="табл1.B3:табл1.B3 табл1.B4:табл1.B13 табл1.K3:табл1.K3 табл1.K4:табл1.K1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104855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табл" table:style-name="ta2">
        <table:table-column table:style-name="co9" table:number-columns-repeated="4" table:default-cell-style-name="Default"/>
        <table:table-column table:style-name="co12" table:number-columns-repeated="7" table:default-cell-style-name="Default"/>
        <table:table-row table:style-name="ro2">
          <table:table-cell table:style-name="ce12" office:value-type="string">
            <text:p>Месяц</text:p>
          </table:table-cell>
          <table:table-cell table:style-name="ce12" office:value-type="string">
            <text:p>Кол-во</text:p>
            <text:p>изделий </text:p>
          </table:table-cell>
          <table:table-cell table:style-name="ce12" office:value-type="string">
            <text:p>Стоимость</text:p>
            <text:p>изделия </text:p>
          </table:table-cell>
          <table:table-cell table:style-name="ce12" office:value-type="string">
            <text:p>Сумма</text:p>
            <text:p/>
          </table:table-cell>
          <table:table-cell table:style-name="ce12" office:value-type="string">
            <text:p>Премия,</text:p>
            <text:p>5%</text:p>
            <text:p/>
          </table:table-cell>
          <table:table-cell table:style-name="ce12" office:value-type="string">
            <text:p>Районный</text:p>
            <text:p>Коэф.,30%</text:p>
          </table:table-cell>
          <table:table-cell table:style-name="ce12" office:value-type="string">
            <text:p>Всего</text:p>
            <text:p>Начисл.</text:p>
          </table:table-cell>
          <table:table-cell table:style-name="ce12" office:value-type="string">
            <text:p>Подоходный</text:p>
            <text:p>Налог, 13%</text:p>
          </table:table-cell>
          <table:table-cell table:style-name="ce12" office:value-type="string">
            <text:p>Пенсионный</text:p>
            <text:p>Фонд, 2%</text:p>
          </table:table-cell>
          <table:table-cell table:style-name="ce12" office:value-type="string">
            <text:p>Всего</text:p>
            <text:p>Удерж.</text:p>
          </table:table-cell>
          <table:table-cell table:style-name="ce12" office:value-type="string">
            <text:p>Итого</text:p>
          </table:table-cell>
        </table:table-row>
        <table:table-row table:style-name="ro1">
          <table:table-cell table:style-name="ce12" office:value-type="string">
            <text:p>Январь</text:p>
          </table:table-cell>
          <table:table-cell table:style-name="ce13" office:value-type="float" office:value="28">
            <text:p>28</text:p>
          </table:table-cell>
          <table:table-cell table:style-name="ce7" office:value-type="float" office:value="100">
            <text:p>100</text:p>
          </table:table-cell>
          <table:table-cell table:style-name="ce13" table:formula="of:=[.B2]*[.C2]" office:value-type="float" office:value="2800">
            <text:p>2800</text:p>
          </table:table-cell>
          <table:table-cell table:style-name="ce12" table:formula="of:=[.D2]*0.05" office:value-type="float" office:value="140">
            <text:p>140</text:p>
          </table:table-cell>
          <table:table-cell table:style-name="ce13" table:formula="of:=[.D2]*0.3" office:value-type="float" office:value="840">
            <text:p>840</text:p>
          </table:table-cell>
          <table:table-cell table:style-name="ce14" table:formula="of:=[.D2]+[.E2]+[.F2]" office:value-type="float" office:value="3780">
            <text:p>3780</text:p>
          </table:table-cell>
          <table:table-cell table:style-name="ce13" table:formula="of:=[.G2]*0.13" office:value-type="float" office:value="491.4">
            <text:p>491.4</text:p>
          </table:table-cell>
          <table:table-cell table:style-name="ce12" table:formula="of:=[.G2]*0.02" office:value-type="float" office:value="75.6">
            <text:p>75.6</text:p>
          </table:table-cell>
          <table:table-cell table:style-name="ce13" table:formula="of:=[.H2]+[.I2]" office:value-type="float" office:value="567">
            <text:p>567</text:p>
          </table:table-cell>
          <table:table-cell table:style-name="ce14" table:formula="of:=[.G2]-[.J2]" office:value-type="float" office:value="3213">
            <text:p>3213</text:p>
          </table:table-cell>
        </table:table-row>
        <table:table-row table:style-name="ro1">
          <table:table-cell table:style-name="ce12" office:value-type="string">
            <text:p>Февраль 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105.2">
            <text:p>105.2</text:p>
          </table:table-cell>
          <table:table-cell table:style-name="ce13" table:formula="of:=[.B3]*[.C3]" office:value-type="float" office:value="2104">
            <text:p>2104</text:p>
          </table:table-cell>
          <table:table-cell table:style-name="ce12" table:formula="of:=[.D3]*0.05" office:value-type="float" office:value="105.2">
            <text:p>105.2</text:p>
          </table:table-cell>
          <table:table-cell table:style-name="ce13" table:formula="of:=[.D3]*0.3" office:value-type="float" office:value="631.2">
            <text:p>631.2</text:p>
          </table:table-cell>
          <table:table-cell table:style-name="ce14" table:formula="of:=[.D3]+[.E3]+[.F3]" office:value-type="float" office:value="2840.4">
            <text:p>2840.4</text:p>
          </table:table-cell>
          <table:table-cell table:style-name="ce13" table:formula="of:=[.G3]*0.13" office:value-type="float" office:value="369.252">
            <text:p>369.252</text:p>
          </table:table-cell>
          <table:table-cell table:style-name="ce12" table:formula="of:=[.G3]*0.02" office:value-type="float" office:value="56.808">
            <text:p>56.808</text:p>
          </table:table-cell>
          <table:table-cell table:style-name="ce13" table:formula="of:=[.H3]+[.I3]" office:value-type="float" office:value="426.06">
            <text:p>426.06</text:p>
          </table:table-cell>
          <table:table-cell table:style-name="ce14" table:formula="of:=[.G3]-[.J3]" office:value-type="float" office:value="2414.34">
            <text:p>2414.34</text:p>
          </table:table-cell>
        </table:table-row>
        <table:table-row table:style-name="ro1">
          <table:table-cell table:style-name="ce12" office:value-type="string">
            <text:p>Март</text:p>
          </table:table-cell>
          <table:table-cell table:style-name="ce13" office:value-type="float" office:value="27">
            <text:p>27</text:p>
          </table:table-cell>
          <table:table-cell table:style-name="ce7" office:value-type="float" office:value="103.34">
            <text:p>103.34</text:p>
          </table:table-cell>
          <table:table-cell table:style-name="ce13" table:formula="of:=[.B4]*[.C4]" office:value-type="float" office:value="2790.18">
            <text:p>2790.18</text:p>
          </table:table-cell>
          <table:table-cell table:style-name="ce12" table:formula="of:=[.D4]*0.05" office:value-type="float" office:value="139.509">
            <text:p>139.509</text:p>
          </table:table-cell>
          <table:table-cell table:style-name="ce13" table:formula="of:=[.D4]*0.3" office:value-type="float" office:value="837.054">
            <text:p>837.054</text:p>
          </table:table-cell>
          <table:table-cell table:style-name="ce14" table:formula="of:=[.D4]+[.E4]+[.F4]" office:value-type="float" office:value="3766.743">
            <text:p>3766.743</text:p>
          </table:table-cell>
          <table:table-cell table:style-name="ce13" table:formula="of:=[.G4]*0.13" office:value-type="float" office:value="489.67659">
            <text:p>489.67659</text:p>
          </table:table-cell>
          <table:table-cell table:style-name="ce12" table:formula="of:=[.G4]*0.02" office:value-type="float" office:value="75.33486">
            <text:p>75.33486</text:p>
          </table:table-cell>
          <table:table-cell table:style-name="ce13" table:formula="of:=[.H4]+[.I4]" office:value-type="float" office:value="565.01145">
            <text:p>565.01145</text:p>
          </table:table-cell>
          <table:table-cell table:style-name="ce14" table:formula="of:=[.G4]-[.J4]" office:value-type="float" office:value="3201.73155">
            <text:p>3201.73155</text:p>
          </table:table-cell>
        </table:table-row>
        <table:table-row table:style-name="ro1">
          <table:table-cell table:style-name="ce12" office:value-type="string">
            <text:p>Апрель</text:p>
          </table:table-cell>
          <table:table-cell table:style-name="ce13" office:value-type="float" office:value="26">
            <text:p>26</text:p>
          </table:table-cell>
          <table:table-cell table:style-name="ce7" office:value-type="float" office:value="100">
            <text:p>100</text:p>
          </table:table-cell>
          <table:table-cell table:style-name="ce13" table:formula="of:=[.B5]*[.C5]" office:value-type="float" office:value="2600">
            <text:p>2600</text:p>
          </table:table-cell>
          <table:table-cell table:style-name="ce12" table:formula="of:=[.D5]*0.05" office:value-type="float" office:value="130">
            <text:p>130</text:p>
          </table:table-cell>
          <table:table-cell table:style-name="ce13" table:formula="of:=[.D5]*0.3" office:value-type="float" office:value="780">
            <text:p>780</text:p>
          </table:table-cell>
          <table:table-cell table:style-name="ce14" table:formula="of:=[.D5]+[.E5]+[.F5]" office:value-type="float" office:value="3510">
            <text:p>3510</text:p>
          </table:table-cell>
          <table:table-cell table:style-name="ce13" table:formula="of:=[.G5]*0.13" office:value-type="float" office:value="456.3">
            <text:p>456.3</text:p>
          </table:table-cell>
          <table:table-cell table:style-name="ce12" table:formula="of:=[.G5]*0.02" office:value-type="float" office:value="70.2">
            <text:p>70.2</text:p>
          </table:table-cell>
          <table:table-cell table:style-name="ce13" table:formula="of:=[.H5]+[.I5]" office:value-type="float" office:value="526.5">
            <text:p>526.5</text:p>
          </table:table-cell>
          <table:table-cell table:style-name="ce14" table:formula="of:=[.G5]-[.J5]" office:value-type="float" office:value="2983.5">
            <text:p>2983.5</text:p>
          </table:table-cell>
        </table:table-row>
        <table:table-row table:style-name="ro1">
          <table:table-cell table:style-name="ce12" office:value-type="string">
            <text:p>Май</text:p>
          </table:table-cell>
          <table:table-cell table:style-name="ce13" office:value-type="float" office:value="21">
            <text:p>21</text:p>
          </table:table-cell>
          <table:table-cell table:style-name="ce7" office:value-type="float" office:value="109.45">
            <text:p>109.45</text:p>
          </table:table-cell>
          <table:table-cell table:style-name="ce13" table:formula="of:=[.B6]*[.C6]" office:value-type="float" office:value="2298.45">
            <text:p>2298.45</text:p>
          </table:table-cell>
          <table:table-cell table:style-name="ce12" table:formula="of:=[.D6]*0.05" office:value-type="float" office:value="114.9225">
            <text:p>114.9225</text:p>
          </table:table-cell>
          <table:table-cell table:style-name="ce13" table:formula="of:=[.D6]*0.3" office:value-type="float" office:value="689.535">
            <text:p>689.535</text:p>
          </table:table-cell>
          <table:table-cell table:style-name="ce14" table:formula="of:=[.D6]+[.E6]+[.F6]" office:value-type="float" office:value="3102.9075">
            <text:p>3102.9075</text:p>
          </table:table-cell>
          <table:table-cell table:style-name="ce13" table:formula="of:=[.G6]*0.13" office:value-type="float" office:value="403.377975">
            <text:p>403.377975</text:p>
          </table:table-cell>
          <table:table-cell table:style-name="ce12" table:formula="of:=[.G6]*0.02" office:value-type="float" office:value="62.05815">
            <text:p>62.05815</text:p>
          </table:table-cell>
          <table:table-cell table:style-name="ce13" table:formula="of:=[.H6]+[.I6]" office:value-type="float" office:value="465.436125">
            <text:p>465.436125</text:p>
          </table:table-cell>
          <table:table-cell table:style-name="ce14" table:formula="of:=[.G6]-[.J6]" office:value-type="float" office:value="2637.471375">
            <text:p>2637.471375</text:p>
          </table:table-cell>
        </table:table-row>
        <table:table-row table:style-name="ro1">
          <table:table-cell table:style-name="ce7" office:value-type="string">
            <text:p>Июнь </text:p>
          </table:table-cell>
          <table:table-cell table:style-name="ce13" office:value-type="float" office:value="29">
            <text:p>29</text:p>
          </table:table-cell>
          <table:table-cell table:style-name="ce7" office:value-type="float" office:value="103">
            <text:p>103</text:p>
          </table:table-cell>
          <table:table-cell table:style-name="ce13" table:formula="of:=[.B7]*[.C7]" office:value-type="float" office:value="2987">
            <text:p>2987</text:p>
          </table:table-cell>
          <table:table-cell table:style-name="ce12" table:formula="of:=[.D7]*0.05" office:value-type="float" office:value="149.35">
            <text:p>149.35</text:p>
          </table:table-cell>
          <table:table-cell table:style-name="ce13" table:formula="of:=[.D7]*0.3" office:value-type="float" office:value="896.1">
            <text:p>896.1</text:p>
          </table:table-cell>
          <table:table-cell table:style-name="ce14" table:formula="of:=[.D7]+[.E7]+[.F7]" office:value-type="float" office:value="4032.45">
            <text:p>4032.45</text:p>
          </table:table-cell>
          <table:table-cell table:style-name="ce13" table:formula="of:=[.G7]*0.13" office:value-type="float" office:value="524.2185">
            <text:p>524.2185</text:p>
          </table:table-cell>
          <table:table-cell table:style-name="ce12" table:formula="of:=[.G7]*0.02" office:value-type="float" office:value="80.649">
            <text:p>80.649</text:p>
          </table:table-cell>
          <table:table-cell table:style-name="ce13" table:formula="of:=[.H7]+[.I7]" office:value-type="float" office:value="604.8675">
            <text:p>604.8675</text:p>
          </table:table-cell>
          <table:table-cell table:style-name="ce14" table:formula="of:=[.G7]-[.J7]" office:value-type="float" office:value="3427.5825">
            <text:p>3427.5825</text:p>
          </table:table-cell>
        </table:table-row>
        <table:table-row table:style-name="ro1">
          <table:table-cell table:style-name="ce12" office:value-type="string">
            <text:p>Июль</text:p>
          </table:table-cell>
          <table:table-cell table:style-name="ce13" office:value-type="float" office:value="30">
            <text:p>30</text:p>
          </table:table-cell>
          <table:table-cell table:style-name="ce7" office:value-type="float" office:value="102.56">
            <text:p>102.56</text:p>
          </table:table-cell>
          <table:table-cell table:style-name="ce13" table:formula="of:=[.B8]*[.C8]" office:value-type="float" office:value="3076.8">
            <text:p>3076.8</text:p>
          </table:table-cell>
          <table:table-cell table:style-name="ce12" table:formula="of:=[.D8]*0.05" office:value-type="float" office:value="153.84">
            <text:p>153.84</text:p>
          </table:table-cell>
          <table:table-cell table:style-name="ce13" table:formula="of:=[.D8]*0.3" office:value-type="float" office:value="923.04">
            <text:p>923.04</text:p>
          </table:table-cell>
          <table:table-cell table:style-name="ce14" table:formula="of:=[.D8]+[.E8]+[.F8]" office:value-type="float" office:value="4153.68">
            <text:p>4153.68</text:p>
          </table:table-cell>
          <table:table-cell table:style-name="ce13" table:formula="of:=[.G8]*0.13" office:value-type="float" office:value="539.9784">
            <text:p>539.9784</text:p>
          </table:table-cell>
          <table:table-cell table:style-name="ce12" table:formula="of:=[.G8]*0.02" office:value-type="float" office:value="83.0736">
            <text:p>83.0736</text:p>
          </table:table-cell>
          <table:table-cell table:style-name="ce13" table:formula="of:=[.H8]+[.I8]" office:value-type="float" office:value="623.052">
            <text:p>623.052</text:p>
          </table:table-cell>
          <table:table-cell table:style-name="ce14" table:formula="of:=[.G8]-[.J8]" office:value-type="float" office:value="3530.628">
            <text:p>3530.628</text:p>
          </table:table-cell>
        </table:table-row>
        <table:table-row table:style-name="ro1">
          <table:table-cell table:style-name="ce12" office:value-type="string">
            <text:p>Август</text:p>
          </table:table-cell>
          <table:table-cell table:style-name="ce13" office:value-type="float" office:value="31">
            <text:p>31</text:p>
          </table:table-cell>
          <table:table-cell table:style-name="ce7" office:value-type="float" office:value="106.8">
            <text:p>106.8</text:p>
          </table:table-cell>
          <table:table-cell table:style-name="ce13" table:formula="of:=[.B9]*[.C9]" office:value-type="float" office:value="3310.8">
            <text:p>3310.8</text:p>
          </table:table-cell>
          <table:table-cell table:style-name="ce12" table:formula="of:=[.D9]*0.05" office:value-type="float" office:value="165.54">
            <text:p>165.54</text:p>
          </table:table-cell>
          <table:table-cell table:style-name="ce13" table:formula="of:=[.D9]*0.3" office:value-type="float" office:value="993.24">
            <text:p>993.24</text:p>
          </table:table-cell>
          <table:table-cell table:style-name="ce14" table:formula="of:=[.D9]+[.E9]+[.F9]" office:value-type="float" office:value="4469.58">
            <text:p>4469.58</text:p>
          </table:table-cell>
          <table:table-cell table:style-name="ce13" table:formula="of:=[.G9]*0.13" office:value-type="float" office:value="581.0454">
            <text:p>581.0454</text:p>
          </table:table-cell>
          <table:table-cell table:style-name="ce12" table:formula="of:=[.G9]*0.02" office:value-type="float" office:value="89.3916">
            <text:p>89.3916</text:p>
          </table:table-cell>
          <table:table-cell table:style-name="ce13" table:formula="of:=[.H9]+[.I9]" office:value-type="float" office:value="670.437">
            <text:p>670.437</text:p>
          </table:table-cell>
          <table:table-cell table:style-name="ce14" table:formula="of:=[.G9]-[.J9]" office:value-type="float" office:value="3799.143">
            <text:p>3799.143</text:p>
          </table:table-cell>
        </table:table-row>
        <table:table-row table:style-name="ro1">
          <table:table-cell table:style-name="ce7" office:value-type="string">
            <text:p>Сентябрь </text:p>
          </table:table-cell>
          <table:table-cell table:style-name="ce13" office:value-type="float" office:value="28">
            <text:p>28</text:p>
          </table:table-cell>
          <table:table-cell table:style-name="ce7" office:value-type="float" office:value="105">
            <text:p>105</text:p>
          </table:table-cell>
          <table:table-cell table:style-name="ce13" table:formula="of:=[.B10]*[.C10]" office:value-type="float" office:value="2940">
            <text:p>2940</text:p>
          </table:table-cell>
          <table:table-cell table:style-name="ce12" table:formula="of:=[.D10]*0.05" office:value-type="float" office:value="147">
            <text:p>147</text:p>
          </table:table-cell>
          <table:table-cell table:style-name="ce13" table:formula="of:=[.D10]*0.3" office:value-type="float" office:value="882">
            <text:p>882</text:p>
          </table:table-cell>
          <table:table-cell table:style-name="ce14" table:formula="of:=[.D10]+[.E10]+[.F10]" office:value-type="float" office:value="3969">
            <text:p>3969</text:p>
          </table:table-cell>
          <table:table-cell table:style-name="ce13" table:formula="of:=[.G10]*0.13" office:value-type="float" office:value="515.97">
            <text:p>515.97</text:p>
          </table:table-cell>
          <table:table-cell table:style-name="ce12" table:formula="of:=[.G10]*0.02" office:value-type="float" office:value="79.38">
            <text:p>79.38</text:p>
          </table:table-cell>
          <table:table-cell table:style-name="ce13" table:formula="of:=[.H10]+[.I10]" office:value-type="float" office:value="595.35">
            <text:p>595.35</text:p>
          </table:table-cell>
          <table:table-cell table:style-name="ce14" table:formula="of:=[.G10]-[.J10]" office:value-type="float" office:value="3373.65">
            <text:p>3373.65</text:p>
          </table:table-cell>
        </table:table-row>
        <table:table-row table:style-name="ro1">
          <table:table-cell table:style-name="ce12" office:value-type="string">
            <text:p>Октябрь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107">
            <text:p>107</text:p>
          </table:table-cell>
          <table:table-cell table:style-name="ce13" table:formula="of:=[.B11]*[.C11]" office:value-type="float" office:value="2782">
            <text:p>2782</text:p>
          </table:table-cell>
          <table:table-cell table:style-name="ce12" table:formula="of:=[.D11]*0.05" office:value-type="float" office:value="139.1">
            <text:p>139.1</text:p>
          </table:table-cell>
          <table:table-cell table:style-name="ce13" table:formula="of:=[.D11]*0.3" office:value-type="float" office:value="834.6">
            <text:p>834.6</text:p>
          </table:table-cell>
          <table:table-cell table:style-name="ce14" table:formula="of:=[.D11]+[.E11]+[.F11]" office:value-type="float" office:value="3755.7">
            <text:p>3755.7</text:p>
          </table:table-cell>
          <table:table-cell table:style-name="ce13" table:formula="of:=[.G11]*0.13" office:value-type="float" office:value="488.241">
            <text:p>488.241</text:p>
          </table:table-cell>
          <table:table-cell table:style-name="ce12" table:formula="of:=[.G11]*0.02" office:value-type="float" office:value="75.114">
            <text:p>75.114</text:p>
          </table:table-cell>
          <table:table-cell table:style-name="ce13" table:formula="of:=[.H11]+[.I11]" office:value-type="float" office:value="563.355">
            <text:p>563.355</text:p>
          </table:table-cell>
          <table:table-cell table:style-name="ce14" table:formula="of:=[.G11]-[.J11]" office:value-type="float" office:value="3192.345">
            <text:p>3192.345</text:p>
          </table:table-cell>
        </table:table-row>
        <table:table-row table:style-name="ro1">
          <table:table-cell table:style-name="ce12" office:value-type="string">
            <text:p>Ноябрь</text:p>
          </table:table-cell>
          <table:table-cell table:style-name="ce13" office:value-type="float" office:value="22">
            <text:p>22</text:p>
          </table:table-cell>
          <table:table-cell table:style-name="ce7" office:value-type="float" office:value="103">
            <text:p>103</text:p>
          </table:table-cell>
          <table:table-cell table:style-name="ce13" table:formula="of:=[.B12]*[.C12]" office:value-type="float" office:value="2266">
            <text:p>2266</text:p>
          </table:table-cell>
          <table:table-cell table:style-name="ce12" table:formula="of:=[.D12]*0.05" office:value-type="float" office:value="113.3">
            <text:p>113.3</text:p>
          </table:table-cell>
          <table:table-cell table:style-name="ce13" table:formula="of:=[.D12]*0.3" office:value-type="float" office:value="679.8">
            <text:p>679.8</text:p>
          </table:table-cell>
          <table:table-cell table:style-name="ce14" table:formula="of:=[.D12]+[.E12]+[.F12]" office:value-type="float" office:value="3059.1">
            <text:p>3059.1</text:p>
          </table:table-cell>
          <table:table-cell table:style-name="ce13" table:formula="of:=[.G12]*0.13" office:value-type="float" office:value="397.683">
            <text:p>397.683</text:p>
          </table:table-cell>
          <table:table-cell table:style-name="ce12" table:formula="of:=[.G12]*0.02" office:value-type="float" office:value="61.182">
            <text:p>61.182</text:p>
          </table:table-cell>
          <table:table-cell table:style-name="ce13" table:formula="of:=[.H12]+[.I12]" office:value-type="float" office:value="458.865">
            <text:p>458.865</text:p>
          </table:table-cell>
          <table:table-cell table:style-name="ce14" table:formula="of:=[.G12]-[.J12]" office:value-type="float" office:value="2600.235">
            <text:p>2600.235</text:p>
          </table:table-cell>
        </table:table-row>
        <table:table-row table:style-name="ro1">
          <table:table-cell table:style-name="ce7" office:value-type="string">
            <text:p>Декабрь </text:p>
          </table:table-cell>
          <table:table-cell table:style-name="ce13" office:value-type="float" office:value="29">
            <text:p>29</text:p>
          </table:table-cell>
          <table:table-cell table:style-name="ce7" office:value-type="float" office:value="108">
            <text:p>108</text:p>
          </table:table-cell>
          <table:table-cell table:style-name="ce13" table:formula="of:=[.B13]*[.C13]" office:value-type="float" office:value="3132">
            <text:p>3132</text:p>
          </table:table-cell>
          <table:table-cell table:style-name="ce12" table:formula="of:=[.D13]*0.05" office:value-type="float" office:value="156.6">
            <text:p>156.6</text:p>
          </table:table-cell>
          <table:table-cell table:style-name="ce13" table:formula="of:=[.D13]*0.3" office:value-type="float" office:value="939.6">
            <text:p>939.6</text:p>
          </table:table-cell>
          <table:table-cell table:style-name="ce14" table:formula="of:=[.D13]+[.E13]+[.F13]" office:value-type="float" office:value="4228.2">
            <text:p>4228.2</text:p>
          </table:table-cell>
          <table:table-cell table:style-name="ce13" table:formula="of:=[.G13]*0.13" office:value-type="float" office:value="549.666">
            <text:p>549.666</text:p>
          </table:table-cell>
          <table:table-cell table:style-name="ce12" table:formula="of:=[.G13]*0.02" office:value-type="float" office:value="84.564">
            <text:p>84.564</text:p>
          </table:table-cell>
          <table:table-cell table:style-name="ce13" table:formula="of:=[.H13]+[.I13]" office:value-type="float" office:value="634.23">
            <text:p>634.23</text:p>
          </table:table-cell>
          <table:table-cell table:style-name="ce14" table:formula="of:=[.G13]-[.J13]" office:value-type="float" office:value="3593.97">
            <text:p>3593.97</text:p>
          </table:table-cell>
        </table:table-row>
        <table:table-row table:style-name="ro4">
          <table:table-cell>
            <draw:frame table:end-cell-address="табл.H30" table:end-x="0.0898in" table:end-y="0.0181in" draw:z-index="0" draw:style-name="gr1" svg:width="6.2988in" svg:height="3.5429in" svg:x="0in" svg:y="0.0394in">
              <draw:object draw:notify-on-update-of-ranges="табл.A2:табл.A2 табл.A3:табл.A13 табл.D2:табл.D2 табл.D3:табл.D1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8"/>
          <table:table-cell table:style-name="ce15" office:value-type="string">
            <text:p>Ср.знач </text:p>
          </table:table-cell>
          <table:table-cell table:style-name="ce2" table:formula="of:=AVERAGE([.K2:.K13])" office:value-type="float" office:value="3163.96636875">
            <text:p>3163.96636875</text:p>
          </table:table-cell>
        </table:table-row>
        <table:table-row table:style-name="ro4">
          <table:table-cell table:number-columns-repeated="9"/>
          <table:table-cell table:style-name="ce15" office:value-type="string">
            <text:p>Мин </text:p>
          </table:table-cell>
          <table:table-cell table:style-name="ce2" table:formula="of:=MIN([.K2:.K13])" office:value-type="float" office:value="2414.34">
            <text:p>2414.34</text:p>
          </table:table-cell>
        </table:table-row>
        <table:table-row table:style-name="ro4">
          <table:table-cell table:number-columns-repeated="9"/>
          <table:table-cell table:style-name="ce15" office:value-type="string">
            <text:p>Мак </text:p>
          </table:table-cell>
          <table:table-cell table:style-name="ce2" table:formula="of:=MAX([.K2:.K13])" office:value-type="float" office:value="3799.143">
            <text:p>3799.143</text:p>
          </table:table-cell>
        </table:table-row>
        <table:table-row table:style-name="ro1">
          <table:table-cell table:number-columns-repeated="11"/>
        </table:table-row>
        <table:table-row table:style-name="ro1" table:number-rows-repeated="13">
          <table:table-cell table:number-columns-repeated="11"/>
        </table:table-row>
        <table:table-row table:style-name="ro1">
          <table:table-cell>
            <draw:frame table:end-cell-address="табл.H48" table:end-x="0.0898in" table:end-y="0.0063in" draw:z-index="1" draw:style-name="gr1" svg:width="6.2988in" svg:height="3.5429in" svg:x="0in" svg:y="0.2154in">
              <draw:object draw:notify-on-update-of-ranges="табл.A2:табл.A2 табл.A3:табл.A13 табл.D2:табл.D2 табл.D3:табл.D13 табл.K2:табл.K2 табл.K3:табл.K1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18">
          <table:table-cell table:number-columns-repeated="11"/>
        </table:table-row>
        <table:table-row table:style-name="ro1">
          <table:table-cell>
            <draw:frame table:end-cell-address="табл.H66" table:end-x="0.0898in" table:end-y="0.1772in" draw:z-index="2" draw:style-name="gr1" svg:width="6.2988in" svg:height="3.5429in" svg:x="0in" svg:y="0.1654in">
              <draw:object draw:notify-on-update-of-ranges="табл.A2:табл.A13 табл.C2:табл.C13 табл.D2:табл.D1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104852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 графики" table:style-name="ta2" table:print="false">
        <table:table-column table:style-name="co12" table:number-columns-repeated="22" table:default-cell-style-name="Default"/>
        <table:table-row table:style-name="ro1">
          <table:table-cell office:value-type="string">
            <text:p>x</text:p>
          </table:table-cell>
          <table:table-cell office:value-type="float" office:value="-5">
            <text:p>-5</text:p>
          </table:table-cell>
          <table:table-cell office:value-type="float" office:value="-4.5">
            <text:p>-4.5</text:p>
          </table:table-cell>
          <table:table-cell office:value-type="float" office:value="-4">
            <text:p>-4</text:p>
          </table:table-cell>
          <table:table-cell office:value-type="float" office:value="-3.5">
            <text:p>-3.5</text:p>
          </table:table-cell>
          <table:table-cell office:value-type="float" office:value="-3">
            <text:p>-3</text:p>
          </table:table-cell>
          <table:table-cell office:value-type="float" office:value="-2.5">
            <text:p>-2.5</text:p>
          </table:table-cell>
          <table:table-cell office:value-type="float" office:value="-2">
            <text:p>-2</text:p>
          </table:table-cell>
          <table:table-cell office:value-type="float" office:value="-1.5">
            <text:p>-1.5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</table:table-row>
        <table:table-row table:style-name="ro5">
          <table:table-cell office:value-type="string">
            <text:p>y<text:span text:style-name="T1">1</text:span></text:p>
          </table:table-cell>
          <table:table-cell table:formula="of:=TAN([.B1])" office:value-type="float" office:value="3.38051500624659">
            <text:p>3.3805150062</text:p>
          </table:table-cell>
          <table:table-cell table:formula="of:=TAN([.C1])" office:value-type="float" office:value="-4.63733205455119">
            <text:p>-4.6373320546</text:p>
          </table:table-cell>
          <table:table-cell table:formula="of:=TAN([.D1])" office:value-type="float" office:value="-1.15782128234958">
            <text:p>-1.1578212823</text:p>
          </table:table-cell>
          <table:table-cell table:formula="of:=TAN([.E1])" office:value-type="float" office:value="-0.374585640158595">
            <text:p>-0.3745856402</text:p>
          </table:table-cell>
          <table:table-cell table:formula="of:=TAN([.F1])" office:value-type="float" office:value="0.142546543074278">
            <text:p>0.1425465431</text:p>
          </table:table-cell>
          <table:table-cell table:formula="of:=TAN([.G1])" office:value-type="float" office:value="0.74702229723866">
            <text:p>0.7470222972</text:p>
          </table:table-cell>
          <table:table-cell table:formula="of:=TAN([.H1])" office:value-type="float" office:value="2.18503986326152">
            <text:p>2.1850398633</text:p>
          </table:table-cell>
          <table:table-cell table:formula="of:=TAN([.I1])" office:value-type="float" office:value="-14.1014199471717">
            <text:p>-14.1014199472</text:p>
          </table:table-cell>
          <table:table-cell table:formula="of:=TAN([.J1])" office:value-type="float" office:value="-1.5574077246549">
            <text:p>-1.5574077247</text:p>
          </table:table-cell>
          <table:table-cell table:formula="of:=TAN([.K1])" office:value-type="float" office:value="-0.54630248984379">
            <text:p>-0.5463024898</text:p>
          </table:table-cell>
          <table:table-cell table:formula="of:=TAN([.L1])" office:value-type="float" office:value="0">
            <text:p>0</text:p>
          </table:table-cell>
          <table:table-cell table:formula="of:=TAN([.M1])" office:value-type="float" office:value="0.54630248984379">
            <text:p>0.5463024898</text:p>
          </table:table-cell>
          <table:table-cell table:formula="of:=TAN([.N1])" office:value-type="float" office:value="1.5574077246549">
            <text:p>1.5574077247</text:p>
          </table:table-cell>
          <table:table-cell table:formula="of:=TAN([.O1])" office:value-type="float" office:value="14.1014199471717">
            <text:p>14.1014199472</text:p>
          </table:table-cell>
          <table:table-cell table:formula="of:=TAN([.P1])" office:value-type="float" office:value="-2.18503986326152">
            <text:p>-2.1850398633</text:p>
          </table:table-cell>
          <table:table-cell table:formula="of:=TAN([.Q1])" office:value-type="float" office:value="-0.74702229723866">
            <text:p>-0.7470222972</text:p>
          </table:table-cell>
          <table:table-cell table:formula="of:=TAN([.R1])" office:value-type="float" office:value="-0.142546543074278">
            <text:p>-0.1425465431</text:p>
          </table:table-cell>
          <table:table-cell table:formula="of:=TAN([.S1])" office:value-type="float" office:value="0.374585640158595">
            <text:p>0.3745856402</text:p>
          </table:table-cell>
          <table:table-cell table:formula="of:=TAN([.T1])" office:value-type="float" office:value="1.15782128234958">
            <text:p>1.1578212823</text:p>
          </table:table-cell>
          <table:table-cell table:formula="of:=TAN([.U1])" office:value-type="float" office:value="4.63733205455119">
            <text:p>4.6373320546</text:p>
          </table:table-cell>
          <table:table-cell table:formula="of:=TAN([.V1])" office:value-type="float" office:value="-3.38051500624659">
            <text:p>-3.3805150062</text:p>
          </table:table-cell>
        </table:table-row>
        <table:table-row table:style-name="ro5">
          <table:table-cell office:value-type="string">
            <text:p><text:span text:style-name="T2">y</text:span><text:span text:style-name="T3">2</text:span></text:p>
          </table:table-cell>
          <table:table-cell table:formula="of:=1/TAN([.B1])" office:value-type="float" office:value="0.295812915532745">
            <text:p>0.2958129155</text:p>
          </table:table-cell>
          <table:table-cell table:formula="of:=1/TAN([.C1])" office:value-type="float" office:value="-0.215641232552794">
            <text:p>-0.2156412326</text:p>
          </table:table-cell>
          <table:table-cell table:formula="of:=1/TAN([.D1])" office:value-type="float" office:value="-0.863691154450617">
            <text:p>-0.8636911545</text:p>
          </table:table-cell>
          <table:table-cell table:formula="of:=1/TAN([.E1])" office:value-type="float" office:value="-2.66961648496887">
            <text:p>-2.669616485</text:p>
          </table:table-cell>
          <table:table-cell table:formula="of:=1/TAN([.F1])" office:value-type="float" office:value="7.01525255143453">
            <text:p>7.0152525514</text:p>
          </table:table-cell>
          <table:table-cell table:formula="of:=1/TAN([.G1])" office:value-type="float" office:value="1.33864812830415">
            <text:p>1.3386481283</text:p>
          </table:table-cell>
          <table:table-cell table:formula="of:=1/TAN([.H1])" office:value-type="float" office:value="0.457657554360286">
            <text:p>0.4576575544</text:p>
          </table:table-cell>
          <table:table-cell table:formula="of:=1/TAN([.I1])" office:value-type="float" office:value="-0.0709148443026525">
            <text:p>-0.0709148443</text:p>
          </table:table-cell>
          <table:table-cell table:formula="of:=1/TAN([.J1])" office:value-type="float" office:value="-0.642092615934331">
            <text:p>-0.6420926159</text:p>
          </table:table-cell>
          <table:table-cell table:formula="of:=1/TAN([.K1])" office:value-type="float" office:value="-1.83048772171245">
            <text:p>-1.8304877217</text:p>
          </table:table-cell>
          <table:table-cell table:formula="of:=1/TAN([.L1])" office:value-type="float" office:value="0">
            <text:p>#DIV/0!</text:p>
          </table:table-cell>
          <table:table-cell table:formula="of:=1/TAN([.M1])" office:value-type="float" office:value="1.83048772171245">
            <text:p>1.8304877217</text:p>
          </table:table-cell>
          <table:table-cell table:formula="of:=1/TAN([.N1])" office:value-type="float" office:value="0.642092615934331">
            <text:p>0.6420926159</text:p>
          </table:table-cell>
          <table:table-cell table:formula="of:=1/TAN([.O1])" office:value-type="float" office:value="0.0709148443026525">
            <text:p>0.0709148443</text:p>
          </table:table-cell>
          <table:table-cell table:formula="of:=1/TAN([.P1])" office:value-type="float" office:value="-0.457657554360286">
            <text:p>-0.4576575544</text:p>
          </table:table-cell>
          <table:table-cell table:formula="of:=1/TAN([.Q1])" office:value-type="float" office:value="-1.33864812830415">
            <text:p>-1.3386481283</text:p>
          </table:table-cell>
          <table:table-cell table:formula="of:=1/TAN([.R1])" office:value-type="float" office:value="-7.01525255143453">
            <text:p>-7.0152525514</text:p>
          </table:table-cell>
          <table:table-cell table:formula="of:=1/TAN([.S1])" office:value-type="float" office:value="2.66961648496887">
            <text:p>2.669616485</text:p>
          </table:table-cell>
          <table:table-cell table:formula="of:=1/TAN([.T1])" office:value-type="float" office:value="0.863691154450617">
            <text:p>0.8636911545</text:p>
          </table:table-cell>
          <table:table-cell table:formula="of:=1/TAN([.U1])" office:value-type="float" office:value="0.215641232552794">
            <text:p>0.2156412326</text:p>
          </table:table-cell>
          <table:table-cell table:formula="of:=1/TAN([.V1])" office:value-type="float" office:value="-0.295812915532745">
            <text:p>-0.2958129155</text:p>
          </table:table-cell>
        </table:table-row>
        <table:table-row table:style-name="ro6">
          <table:table-cell table:number-columns-repeated="22"/>
        </table:table-row>
        <table:table-row table:style-name="ro6">
          <table:table-cell>
            <draw:frame table:end-cell-address="' графики'.H24" table:end-x="0.076in" table:end-y="0.0067in" draw:z-index="0" draw:style-name="gr1" svg:width="6.2988in" svg:height="3.5429in" svg:x="0in" svg:y="0.026in">
              <draw:object draw:notify-on-update-of-ranges="' графики'.A1:' графики'.A1 ' графики'.B1:' графики'.V1 ' графики'.A2:' графики'.A2 ' графики'.B2:' графики'.V2 ' графики'.A1:' графики'.A1 ' графики'.B1:' графики'.V1 ' графики'.A3:' графики'.A3 ' графики'.B3:' графики'.V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21"/>
        </table:table-row>
        <table:table-row table:style-name="ro6" table:number-rows-repeated="22">
          <table:table-cell table:number-columns-repeated="22"/>
        </table:table-row>
        <table:table-row table:style-name="ro1">
          <table:table-cell office:value-type="string">
            <text:p>x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office:value-type="float" office:value="6">
            <text:p>6</text:p>
          </table:table-cell>
          <table:table-cell office:value-type="float" office:value="6.5">
            <text:p>6.5</text:p>
          </table:table-cell>
          <table:table-cell office:value-type="float" office:value="7">
            <text:p>7</text:p>
          </table:table-cell>
          <table:table-cell office:value-type="float" office:value="7.5">
            <text:p>7.5</text:p>
          </table:table-cell>
          <table:table-cell office:value-type="float" office:value="8">
            <text:p>8</text:p>
          </table:table-cell>
          <table:table-cell office:value-type="float" office:value="8.5">
            <text:p>8.5</text:p>
          </table:table-cell>
          <table:table-cell office:value-type="float" office:value="9">
            <text:p>9</text:p>
          </table:table-cell>
          <table:table-cell office:value-type="float" office:value="9.5">
            <text:p>9.5</text:p>
          </table:table-cell>
          <table:table-cell office:value-type="float" office:value="10">
            <text:p>10</text:p>
          </table:table-cell>
          <table:table-cell/>
        </table:table-row>
        <table:table-row table:style-name="ro5">
          <table:table-cell office:value-type="string">
            <text:p>y<text:span text:style-name="T1">1</text:span></text:p>
          </table:table-cell>
          <table:table-cell table:formula="of:=LN([.B28])" office:value-type="float" office:value="-0.693147180559945">
            <text:p>-0.6931471806</text:p>
          </table:table-cell>
          <table:table-cell table:formula="of:=LN([.C28])" office:value-type="float" office:value="0">
            <text:p>0</text:p>
          </table:table-cell>
          <table:table-cell table:formula="of:=LN([.D28])" office:value-type="float" office:value="0.405465108108164">
            <text:p>0.4054651081</text:p>
          </table:table-cell>
          <table:table-cell table:formula="of:=LN([.E28])" office:value-type="float" office:value="0.693147180559945">
            <text:p>0.6931471806</text:p>
          </table:table-cell>
          <table:table-cell table:formula="of:=LN([.F28])" office:value-type="float" office:value="0.916290731874155">
            <text:p>0.9162907319</text:p>
          </table:table-cell>
          <table:table-cell table:formula="of:=LN([.G28])" office:value-type="float" office:value="1.09861228866811">
            <text:p>1.0986122887</text:p>
          </table:table-cell>
          <table:table-cell table:formula="of:=LN([.H28])" office:value-type="float" office:value="1.25276296849537">
            <text:p>1.2527629685</text:p>
          </table:table-cell>
          <table:table-cell table:formula="of:=LN([.I28])" office:value-type="float" office:value="1.38629436111989">
            <text:p>1.3862943611</text:p>
          </table:table-cell>
          <table:table-cell table:formula="of:=LN([.J28])" office:value-type="float" office:value="1.50407739677627">
            <text:p>1.5040773968</text:p>
          </table:table-cell>
          <table:table-cell table:formula="of:=LN([.K28])" office:value-type="float" office:value="1.6094379124341">
            <text:p>1.6094379124</text:p>
          </table:table-cell>
          <table:table-cell table:formula="of:=LN([.L28])" office:value-type="float" office:value="1.70474809223843">
            <text:p>1.7047480922</text:p>
          </table:table-cell>
          <table:table-cell table:formula="of:=LN([.M28])" office:value-type="float" office:value="1.79175946922806">
            <text:p>1.7917594692</text:p>
          </table:table-cell>
          <table:table-cell table:formula="of:=LN([.N28])" office:value-type="float" office:value="1.87180217690159">
            <text:p>1.8718021769</text:p>
          </table:table-cell>
          <table:table-cell table:formula="of:=LN([.O28])" office:value-type="float" office:value="1.94591014905531">
            <text:p>1.9459101491</text:p>
          </table:table-cell>
          <table:table-cell table:formula="of:=LN([.P28])" office:value-type="float" office:value="2.01490302054226">
            <text:p>2.0149030205</text:p>
          </table:table-cell>
          <table:table-cell table:formula="of:=LN([.Q28])" office:value-type="float" office:value="2.07944154167984">
            <text:p>2.0794415417</text:p>
          </table:table-cell>
          <table:table-cell table:formula="of:=LN([.R28])" office:value-type="float" office:value="2.14006616349627">
            <text:p>2.1400661635</text:p>
          </table:table-cell>
          <table:table-cell table:formula="of:=LN([.S28])" office:value-type="float" office:value="2.19722457733622">
            <text:p>2.1972245773</text:p>
          </table:table-cell>
          <table:table-cell table:formula="of:=LN([.T28])" office:value-type="float" office:value="2.2512917986065">
            <text:p>2.2512917986</text:p>
          </table:table-cell>
          <table:table-cell table:formula="of:=LN([.U28])" office:value-type="float" office:value="2.30258509299405">
            <text:p>2.302585093</text:p>
          </table:table-cell>
          <table:table-cell/>
        </table:table-row>
        <table:table-row table:style-name="ro5">
          <table:table-cell office:value-type="string">
            <text:p><text:span text:style-name="T2">y</text:span><text:span text:style-name="T3">2</text:span></text:p>
          </table:table-cell>
          <table:table-cell table:formula="of:=LOG10([.B28])" office:value-type="float" office:value="-0.301029995663981">
            <text:p>-0.3010299957</text:p>
          </table:table-cell>
          <table:table-cell table:formula="of:=LOG10([.C28])" office:value-type="float" office:value="0">
            <text:p>0</text:p>
          </table:table-cell>
          <table:table-cell table:formula="of:=LOG10([.D28])" office:value-type="float" office:value="0.176091259055681">
            <text:p>0.1760912591</text:p>
          </table:table-cell>
          <table:table-cell table:formula="of:=LOG10([.E28])" office:value-type="float" office:value="0.301029995663981">
            <text:p>0.3010299957</text:p>
          </table:table-cell>
          <table:table-cell table:formula="of:=LOG10([.F28])" office:value-type="float" office:value="0.397940008672038">
            <text:p>0.3979400087</text:p>
          </table:table-cell>
          <table:table-cell table:formula="of:=LOG10([.G28])" office:value-type="float" office:value="0.477121254719662">
            <text:p>0.4771212547</text:p>
          </table:table-cell>
          <table:table-cell table:formula="of:=LOG10([.H28])" office:value-type="float" office:value="0.544068044350276">
            <text:p>0.5440680444</text:p>
          </table:table-cell>
          <table:table-cell table:formula="of:=LOG10([.I28])" office:value-type="float" office:value="0.602059991327962">
            <text:p>0.6020599913</text:p>
          </table:table-cell>
          <table:table-cell table:formula="of:=LOG10([.J28])" office:value-type="float" office:value="0.653212513775344">
            <text:p>0.6532125138</text:p>
          </table:table-cell>
          <table:table-cell table:formula="of:=LOG10([.K28])" office:value-type="float" office:value="0.698970004336019">
            <text:p>0.6989700043</text:p>
          </table:table-cell>
          <table:table-cell table:formula="of:=LOG10([.L28])" office:value-type="float" office:value="0.740362689494244">
            <text:p>0.7403626895</text:p>
          </table:table-cell>
          <table:table-cell table:formula="of:=LOG10([.M28])" office:value-type="float" office:value="0.778151250383644">
            <text:p>0.7781512504</text:p>
          </table:table-cell>
          <table:table-cell table:formula="of:=LOG10([.N28])" office:value-type="float" office:value="0.812913356642856">
            <text:p>0.8129133566</text:p>
          </table:table-cell>
          <table:table-cell table:formula="of:=LOG10([.O28])" office:value-type="float" office:value="0.845098040014257">
            <text:p>0.84509804</text:p>
          </table:table-cell>
          <table:table-cell table:formula="of:=LOG10([.P28])" office:value-type="float" office:value="0.8750612633917">
            <text:p>0.8750612634</text:p>
          </table:table-cell>
          <table:table-cell table:formula="of:=LOG10([.Q28])" office:value-type="float" office:value="0.903089986991943">
            <text:p>0.903089987</text:p>
          </table:table-cell>
          <table:table-cell table:formula="of:=LOG10([.R28])" office:value-type="float" office:value="0.929418925714293">
            <text:p>0.9294189257</text:p>
          </table:table-cell>
          <table:table-cell table:formula="of:=LOG10([.S28])" office:value-type="float" office:value="0.954242509439325">
            <text:p>0.9542425094</text:p>
          </table:table-cell>
          <table:table-cell table:formula="of:=LOG10([.T28])" office:value-type="float" office:value="0.977723605288848">
            <text:p>0.9777236053</text:p>
          </table:table-cell>
          <table:table-cell table:formula="of:=LOG10([.U28])" office:value-type="float" office:value="1">
            <text:p>1</text:p>
          </table:table-cell>
          <table:table-cell/>
        </table:table-row>
        <table:table-row table:style-name="ro5">
          <table:table-cell table:number-columns-repeated="22"/>
        </table:table-row>
        <table:table-row table:style-name="ro5">
          <table:table-cell>
            <draw:frame table:end-cell-address="' графики'.H50" table:end-x="0.076in" table:end-y="0.1709in" draw:z-index="1" draw:style-name="gr1" svg:width="6.2988in" svg:height="3.5429in" svg:x="0in" svg:y="0.0028in">
              <draw:object draw:notify-on-update-of-ranges="' графики'.B28:' графики'.U28 ' графики'.A29:' графики'.A29 ' графики'.B29:' графики'.U29 ' графики'.B28:' графики'.U28 ' графики'.A30:' графики'.A30 ' графики'.B30:' графики'.U3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 grddl:transformation="http://docs.oasis-open.org/office/1.2/xslt/odf2rdf.xsl">
  <office:font-face-decls>
    <style:font-face style:name="PS Astra Sans" svg:font-family="'PS Astr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T Astra Sans1" svg:font-family="'PT Astra Sans'" style:font-family-generic="swiss" style:font-pitch="variable"/>
    <style:font-face style:name="PT Astra Sans" svg:font-family="'PT Astra Sans'" style:font-adornments="Обычный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2" number:min-integer-digits="1"/>
    </number:number-style>
    <number:currency-style style:name="N5107P0" style:volatile="true" number:language="ru" number:country="RU">
      <number:number number:decimal-places="2" number:min-integer-digits="1" number:grouping="true"/>
      <number:text> </number:text>
      <number:currency-symbol>₽</number:currency-symbol>
    </number:currency-style>
    <number:currency-style style:name="N510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>₽</number:currency-symbol>
      <style:map style:condition="value()&gt;=0" style:apply-style-name="N5107P0"/>
    </number:currency-style>
    <style:style style:name="Default" style:family="table-cell">
      <style:table-cell-properties fo:wrap-option="wrap" loext:vertical-justify="auto" style:vertical-align="top"/>
      <style:paragraph-properties css3t:text-justify="auto"/>
      <style:text-properties style:font-name="PT Astra Sans" fo:font-size="12pt" style:font-name-complex="Noto Sans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 loext:vertical-justify="auto" style:vertical-align="middle"/>
      <style:paragraph-properties fo:text-align="center" css3t:text-justify="auto"/>
      <style:text-properties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Стили_20_стрелок_20_1" draw:display-name="Стили стрелок 1" svg:viewBox="0 0 20 30" svg:d="m10 0-10 30h20z"/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937in" fo:margin-bottom="0.3937in" fo:margin-left="0.3937in" fo:margin-right="0.3937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28">04/28/2026</text:date>, <text:time>15:57:3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Минимальные_20_поля" style:display-name="Минимальные поля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23-03-10T11:17:45.034997771</meta:creation-date>
    <dc:title>Таблица</dc:title>
    <meta:generator>LibreOffice/3.3$Win32 LibreOffice_project/330m19$Build-6</meta:generator>
    <meta:editing-duration>PT2H37M18S</meta:editing-duration>
    <meta:editing-cycles>21</meta:editing-cycles>
    <dc:date>2026-04-28T15:57:30.78</dc:date>
    <meta:document-statistic meta:table-count="3" meta:cell-count="411" meta:object-count="7"/>
    <meta:template xlink:type="simple" xlink:actuate="onRequest" xlink:title="Таблица" xlink:href="../../../../usr/lib/libreoffice/share/template/common/ШАБЛОН_ЭЛЕКТРОННОЙ_ТАБЛИЦЫ_2019-07-22.ots" meta:date="2023-03-10T11:17:44.4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89cm" svg:y="4.192cm" chart:style-name="ch2"/>
        <chart:plot-area chart:style-name="ch3" table:cell-range-address="табл1.B3:табл1.B13 табл1.G3:табл1.G13" chart:data-source-has-labels="both" svg:x="0.77cm" svg:y="0.855cm" svg:width="12.379cm" svg:height="7.545cm">
          <chartooo:coordinate-region svg:x="1.577cm" svg:y="1.067cm" svg:width="11.572cm" svg:height="6.236cm"/>
          <chart:axis chart:dimension="x" chart:name="primary-x" chart:style-name="ch4">
            <chart:categories table:cell-range-address="табл1.B4:табл1.B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табл1.G4:табл1.G13" chart:label-cell-address="табл1.G3:табл1.G3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34.8825</text:p>
                <draw:g>
                  <svg:desc>табл1.G3:табл1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Кузьмин Н.В</text:p>
                <draw:g>
                  <svg:desc>табл1.B4:табл1.B13</svg:desc>
                </draw:g>
              </table:table-cell>
              <table:table-cell office:value-type="float" office:value="673.70625">
                <text:p>673.70625</text:p>
                <draw:g>
                  <svg:desc>табл1.G4:табл1.G13</svg:desc>
                </draw:g>
              </table:table-cell>
            </table:table-row>
            <table:table-row>
              <table:table-cell office:value-type="string">
                <text:p>Зверев А.В. </text:p>
              </table:table-cell>
              <table:table-cell office:value-type="float" office:value="685.125">
                <text:p>685.125</text:p>
              </table:table-cell>
            </table:table-row>
            <table:table-row>
              <table:table-cell office:value-type="string">
                <text:p>Сидоров А.К. </text:p>
              </table:table-cell>
              <table:table-cell office:value-type="float" office:value="575.505">
                <text:p>575.505</text:p>
              </table:table-cell>
            </table:table-row>
            <table:table-row>
              <table:table-cell office:value-type="string">
                <text:p>Кузнецов В.А.</text:p>
              </table:table-cell>
              <table:table-cell office:value-type="float" office:value="634.8825">
                <text:p>634.8825</text:p>
              </table:table-cell>
            </table:table-row>
            <table:table-row>
              <table:table-cell office:value-type="string">
                <text:p>Ренуев В.С.</text:p>
              </table:table-cell>
              <table:table-cell office:value-type="float" office:value="822.15">
                <text:p>822.15</text:p>
              </table:table-cell>
            </table:table-row>
            <table:table-row>
              <table:table-cell office:value-type="string">
                <text:p>Боринский В.Н</text:p>
              </table:table-cell>
              <table:table-cell office:value-type="float" office:value="689.04">
                <text:p>689.04</text:p>
              </table:table-cell>
            </table:table-row>
            <table:table-row>
              <table:table-cell office:value-type="string">
                <text:p>Антохин В.А.</text:p>
              </table:table-cell>
              <table:table-cell office:value-type="float" office:value="585.162">
                <text:p>585.162</text:p>
              </table:table-cell>
            </table:table-row>
            <table:table-row>
              <table:table-cell office:value-type="string">
                <text:p>Шевченко П.И</text:p>
              </table:table-cell>
              <table:table-cell office:value-type="float" office:value="719.38125">
                <text:p>719.38125</text:p>
              </table:table-cell>
            </table:table-row>
            <table:table-row>
              <table:table-cell office:value-type="string">
                <text:p>Тирских А.В.</text:p>
              </table:table-cell>
              <table:table-cell office:value-type="float" office:value="799.3125">
                <text:p>799.3125</text:p>
              </table:table-cell>
            </table:table-row>
            <table:table-row>
              <table:table-cell office:value-type="string">
                <text:p>Шарапов И.П </text:p>
              </table:table-cell>
              <table:table-cell office:value-type="float" office:value="580.464">
                <text:p>580.4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45cm" svg:y="4.192cm" chart:style-name="ch2"/>
        <chart:plot-area chart:style-name="ch3" table:cell-range-address="табл.A2:табл.A13 табл.D2:табл.D13" chart:data-source-has-labels="both" svg:x="0.77cm" svg:y="0.855cm" svg:width="13.04cm" svg:height="7.545cm">
          <chartooo:coordinate-region svg:x="1.762cm" svg:y="1.068cm" svg:width="11.857cm" svg:height="6.235cm"/>
          <chart:axis chart:dimension="x" chart:name="primary-x" chart:style-name="ch4">
            <chart:categories table:cell-range-address="табл.A3:табл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табл.D3:табл.D13" chart:label-cell-address="табл.D2:табл.D2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800</text:p>
                <draw:g>
                  <svg:desc>табл.D2:табл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Февраль </text:p>
                <draw:g>
                  <svg:desc>табл.A3:табл.A13</svg:desc>
                </draw:g>
              </table:table-cell>
              <table:table-cell office:value-type="float" office:value="2104">
                <text:p>2104</text:p>
                <draw:g>
                  <svg:desc>табл.D3:табл.D13</svg:desc>
                </draw:g>
              </table:table-cell>
            </table:table-row>
            <table:table-row>
              <table:table-cell office:value-type="string">
                <text:p>Март</text:p>
              </table:table-cell>
              <table:table-cell office:value-type="float" office:value="2790.18">
                <text:p>2790.18</text:p>
              </table:table-cell>
            </table:table-row>
            <table:table-row>
              <table:table-cell office:value-type="string">
                <text:p>Апрель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Май</text:p>
              </table:table-cell>
              <table:table-cell office:value-type="float" office:value="2298.45">
                <text:p>2298.45</text:p>
              </table:table-cell>
            </table:table-row>
            <table:table-row>
              <table:table-cell office:value-type="string">
                <text:p>Июнь </text:p>
              </table:table-cell>
              <table:table-cell office:value-type="float" office:value="2987">
                <text:p>2987</text:p>
              </table:table-cell>
            </table:table-row>
            <table:table-row>
              <table:table-cell office:value-type="string">
                <text:p>Июль</text:p>
              </table:table-cell>
              <table:table-cell office:value-type="float" office:value="3076.8">
                <text:p>3076.8</text:p>
              </table:table-cell>
            </table:table-row>
            <table:table-row>
              <table:table-cell office:value-type="string">
                <text:p>Август</text:p>
              </table:table-cell>
              <table:table-cell office:value-type="float" office:value="3310.8">
                <text:p>3310.8</text:p>
              </table:table-cell>
            </table:table-row>
            <table:table-row>
              <table:table-cell office:value-type="string">
                <text:p>Сентябрь 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string">
                <text:p>Октябрь</text:p>
              </table:table-cell>
              <table:table-cell office:value-type="float" office:value="2782">
                <text:p>2782</text:p>
              </table:table-cell>
            </table:table-row>
            <table:table-row>
              <table:table-cell office:value-type="string">
                <text:p>Ноябрь</text:p>
              </table:table-cell>
              <table:table-cell office:value-type="float" office:value="2266">
                <text:p>2266</text:p>
              </table:table-cell>
            </table:table-row>
            <table:table-row>
              <table:table-cell office:value-type="string">
                <text:p>Декабрь </text:p>
              </table:table-cell>
              <table:table-cell office:value-type="float" office:value="3132">
                <text:p>31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89cm" svg:y="4.192cm" chart:style-name="ch2"/>
        <chart:plot-area chart:style-name="ch3" table:cell-range-address="табл1.B3:табл1.B13 табл1.K3:табл1.K13" chart:data-source-has-labels="both" svg:x="1.116cm" svg:y="0.902cm" svg:width="12.377cm" svg:height="7.542cm">
          <chartooo:coordinate-region svg:x="1.923cm" svg:y="1.114cm" svg:width="11.57cm" svg:height="6.233cm"/>
          <chart:axis chart:dimension="x" chart:name="primary-x" chart:style-name="ch4">
            <chart:categories table:cell-range-address="табл1.B4:табл1.B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табл1.K4:табл1.K13" chart:label-cell-address="табл1.K3:табл1.K3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8.7897</text:p>
                <draw:g>
                  <svg:desc>табл1.K3:табл1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Кузьмин Н.В</text:p>
                <draw:g>
                  <svg:desc>табл1.B4:табл1.B13</svg:desc>
                </draw:g>
              </table:table-cell>
              <table:table-cell office:value-type="float" office:value="500.4675">
                <text:p>500.4675</text:p>
                <draw:g>
                  <svg:desc>табл1.K4:табл1.K13</svg:desc>
                </draw:g>
              </table:table-cell>
            </table:table-row>
            <table:table-row>
              <table:table-cell office:value-type="string">
                <text:p>Зверев А.В. </text:p>
              </table:table-cell>
              <table:table-cell office:value-type="float" office:value="570.9375">
                <text:p>570.9375</text:p>
              </table:table-cell>
            </table:table-row>
            <table:table-row>
              <table:table-cell office:value-type="string">
                <text:p>Сидоров А.К. </text:p>
              </table:table-cell>
              <table:table-cell office:value-type="float" office:value="587.83725">
                <text:p>587.83725</text:p>
              </table:table-cell>
            </table:table-row>
            <table:table-row>
              <table:table-cell office:value-type="string">
                <text:p>Кузнецов В.А.</text:p>
              </table:table-cell>
              <table:table-cell office:value-type="float" office:value="547.8129">
                <text:p>547.8129</text:p>
              </table:table-cell>
            </table:table-row>
            <table:table-row>
              <table:table-cell office:value-type="string">
                <text:p>Ренуев В.С.</text:p>
              </table:table-cell>
              <table:table-cell office:value-type="float" office:value="593.775">
                <text:p>593.775</text:p>
              </table:table-cell>
            </table:table-row>
            <table:table-row>
              <table:table-cell office:value-type="string">
                <text:p>Боринский В.Н</text:p>
              </table:table-cell>
              <table:table-cell office:value-type="float" office:value="615.8295">
                <text:p>615.8295</text:p>
              </table:table-cell>
            </table:table-row>
            <table:table-row>
              <table:table-cell office:value-type="string">
                <text:p>Антохин В.А.</text:p>
              </table:table-cell>
              <table:table-cell office:value-type="float" office:value="581.31225">
                <text:p>581.31225</text:p>
              </table:table-cell>
            </table:table-row>
            <table:table-row>
              <table:table-cell office:value-type="string">
                <text:p>Шевченко П.И</text:p>
              </table:table-cell>
              <table:table-cell office:value-type="float" office:value="534.3975">
                <text:p>534.3975</text:p>
              </table:table-cell>
            </table:table-row>
            <table:table-row>
              <table:table-cell office:value-type="string">
                <text:p>Тирских А.В.</text:p>
              </table:table-cell>
              <table:table-cell office:value-type="float" office:value="570.9375">
                <text:p>570.9375</text:p>
              </table:table-cell>
            </table:table-row>
            <table:table-row>
              <table:table-cell office:value-type="string">
                <text:p>Шарапов И.П </text:p>
              </table:table-cell>
              <table:table-cell office:value-type="float" office:value="518.7897">
                <text:p>518.78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45cm" svg:y="3.954cm" chart:style-name="ch2"/>
        <chart:plot-area chart:style-name="ch3" table:cell-range-address="табл.A2:табл.A13 табл.D2:табл.D13 табл.K2:табл.K13" chart:data-source-has-labels="both" svg:x="0.77cm" svg:y="0.855cm" svg:width="13.04cm" svg:height="7.545cm">
          <chartooo:coordinate-region svg:x="1.762cm" svg:y="1.068cm" svg:width="11.857cm" svg:height="6.235cm"/>
          <chart:axis chart:dimension="x" chart:name="primary-x" chart:style-name="ch4">
            <chart:categories table:cell-range-address="табл.A3:табл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табл.D3:табл.D13" chart:label-cell-address="табл.D2:табл.D2" chart:class="chart:bar">
            <chart:data-point chart:repeated="11"/>
          </chart:series>
          <chart:series chart:style-name="ch8" chart:values-cell-range-address="табл.K3:табл.K13" chart:label-cell-address="табл.K2:табл.K2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800</text:p>
                <draw:g>
                  <svg:desc>табл.D2:табл.D2</svg:desc>
                </draw:g>
              </table:table-cell>
              <table:table-cell office:value-type="string">
                <text:p>3213</text:p>
                <draw:g>
                  <svg:desc>табл.K2:табл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Февраль </text:p>
                <draw:g>
                  <svg:desc>табл.A3:табл.A13</svg:desc>
                </draw:g>
              </table:table-cell>
              <table:table-cell office:value-type="float" office:value="2104">
                <text:p>2104</text:p>
                <draw:g>
                  <svg:desc>табл.D3:табл.D13</svg:desc>
                </draw:g>
              </table:table-cell>
              <table:table-cell office:value-type="float" office:value="2414.34">
                <text:p>2414.34</text:p>
                <draw:g>
                  <svg:desc>табл.K3:табл.K13</svg:desc>
                </draw:g>
              </table:table-cell>
            </table:table-row>
            <table:table-row>
              <table:table-cell office:value-type="string">
                <text:p>Март</text:p>
              </table:table-cell>
              <table:table-cell office:value-type="float" office:value="2790.18">
                <text:p>2790.18</text:p>
              </table:table-cell>
              <table:table-cell office:value-type="float" office:value="3201.73155">
                <text:p>3201.73155</text:p>
              </table:table-cell>
            </table:table-row>
            <table:table-row>
              <table:table-cell office:value-type="string">
                <text:p>Апрель</text:p>
              </table:table-cell>
              <table:table-cell office:value-type="float" office:value="2600">
                <text:p>2600</text:p>
              </table:table-cell>
              <table:table-cell office:value-type="float" office:value="2983.5">
                <text:p>2983.5</text:p>
              </table:table-cell>
            </table:table-row>
            <table:table-row>
              <table:table-cell office:value-type="string">
                <text:p>Май</text:p>
              </table:table-cell>
              <table:table-cell office:value-type="float" office:value="2298.45">
                <text:p>2298.45</text:p>
              </table:table-cell>
              <table:table-cell office:value-type="float" office:value="2637.471375">
                <text:p>2637.471375</text:p>
              </table:table-cell>
            </table:table-row>
            <table:table-row>
              <table:table-cell office:value-type="string">
                <text:p>Июнь </text:p>
              </table:table-cell>
              <table:table-cell office:value-type="float" office:value="2987">
                <text:p>2987</text:p>
              </table:table-cell>
              <table:table-cell office:value-type="float" office:value="3427.5825">
                <text:p>3427.5825</text:p>
              </table:table-cell>
            </table:table-row>
            <table:table-row>
              <table:table-cell office:value-type="string">
                <text:p>Июль</text:p>
              </table:table-cell>
              <table:table-cell office:value-type="float" office:value="3076.8">
                <text:p>3076.8</text:p>
              </table:table-cell>
              <table:table-cell office:value-type="float" office:value="3530.628">
                <text:p>3530.628</text:p>
              </table:table-cell>
            </table:table-row>
            <table:table-row>
              <table:table-cell office:value-type="string">
                <text:p>Август</text:p>
              </table:table-cell>
              <table:table-cell office:value-type="float" office:value="3310.8">
                <text:p>3310.8</text:p>
              </table:table-cell>
              <table:table-cell office:value-type="float" office:value="3799.143">
                <text:p>3799.143</text:p>
              </table:table-cell>
            </table:table-row>
            <table:table-row>
              <table:table-cell office:value-type="string">
                <text:p>Сентябрь </text:p>
              </table:table-cell>
              <table:table-cell office:value-type="float" office:value="2940">
                <text:p>2940</text:p>
              </table:table-cell>
              <table:table-cell office:value-type="float" office:value="3373.65">
                <text:p>3373.65</text:p>
              </table:table-cell>
            </table:table-row>
            <table:table-row>
              <table:table-cell office:value-type="string">
                <text:p>Октябрь</text:p>
              </table:table-cell>
              <table:table-cell office:value-type="float" office:value="2782">
                <text:p>2782</text:p>
              </table:table-cell>
              <table:table-cell office:value-type="float" office:value="3192.345">
                <text:p>3192.345</text:p>
              </table:table-cell>
            </table:table-row>
            <table:table-row>
              <table:table-cell office:value-type="string">
                <text:p>Ноябрь</text:p>
              </table:table-cell>
              <table:table-cell office:value-type="float" office:value="2266">
                <text:p>2266</text:p>
              </table:table-cell>
              <table:table-cell office:value-type="float" office:value="2600.235">
                <text:p>2600.235</text:p>
              </table:table-cell>
            </table:table-row>
            <table:table-row>
              <table:table-cell office:value-type="string">
                <text:p>Декабрь </text:p>
              </table:table-cell>
              <table:table-cell office:value-type="float" office:value="3132">
                <text:p>3132</text:p>
              </table:table-cell>
              <table:table-cell office:value-type="float" office:value="3593.97">
                <text:p>3593.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51cm" svg:y="3.954cm" chart:style-name="ch2"/>
        <chart:plot-area chart:style-name="ch3" table:cell-range-address="табл.A2:табл.A13 табл.C2:табл.D13" chart:data-source-has-labels="column" svg:x="0.77cm" svg:y="0.855cm" svg:width="12.141cm" svg:height="7.545cm">
          <chartooo:coordinate-region svg:x="1.762cm" svg:y="1.068cm" svg:width="10.875cm" svg:height="6.235cm"/>
          <chart:axis chart:dimension="x" chart:name="primary-x" chart:style-name="ch4">
            <chart:categories table:cell-range-address="табл.A2:табл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табл.C2:табл.C13" chart:class="chart:bar">
            <chart:data-point chart:repeated="12"/>
          </chart:series>
          <chart:series chart:style-name="ch8" chart:values-cell-range-address="табл.D2:табл.D13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Январь</text:p>
                <draw:g>
                  <svg:desc>табл.A2:табл.A13</svg:desc>
                </draw:g>
              </table:table-cell>
              <table:table-cell office:value-type="float" office:value="100">
                <text:p>100</text:p>
                <draw:g>
                  <svg:desc>табл.C2:табл.C13</svg:desc>
                </draw:g>
              </table:table-cell>
              <table:table-cell office:value-type="float" office:value="2800">
                <text:p>2800</text:p>
                <draw:g>
                  <svg:desc>табл.D2:табл.D13</svg:desc>
                </draw:g>
              </table:table-cell>
            </table:table-row>
            <table:table-row>
              <table:table-cell office:value-type="string">
                <text:p>Февраль </text:p>
              </table:table-cell>
              <table:table-cell office:value-type="float" office:value="105.2">
                <text:p>105.2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Март</text:p>
              </table:table-cell>
              <table:table-cell office:value-type="float" office:value="103.34">
                <text:p>103.34</text:p>
              </table:table-cell>
              <table:table-cell office:value-type="float" office:value="2790.18">
                <text:p>2790.18</text:p>
              </table:table-cell>
            </table:table-row>
            <table:table-row>
              <table:table-cell office:value-type="string">
                <text:p>Апрель</text:p>
              </table:table-cell>
              <table:table-cell office:value-type="float" office:value="100">
                <text:p>100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Май</text:p>
              </table:table-cell>
              <table:table-cell office:value-type="float" office:value="109.45">
                <text:p>109.45</text:p>
              </table:table-cell>
              <table:table-cell office:value-type="float" office:value="2298.45">
                <text:p>2298.45</text:p>
              </table:table-cell>
            </table:table-row>
            <table:table-row>
              <table:table-cell office:value-type="string">
                <text:p>Июнь </text:p>
              </table:table-cell>
              <table:table-cell office:value-type="float" office:value="103">
                <text:p>103</text:p>
              </table:table-cell>
              <table:table-cell office:value-type="float" office:value="2987">
                <text:p>2987</text:p>
              </table:table-cell>
            </table:table-row>
            <table:table-row>
              <table:table-cell office:value-type="string">
                <text:p>Июль</text:p>
              </table:table-cell>
              <table:table-cell office:value-type="float" office:value="102.56">
                <text:p>102.56</text:p>
              </table:table-cell>
              <table:table-cell office:value-type="float" office:value="3076.8">
                <text:p>3076.8</text:p>
              </table:table-cell>
            </table:table-row>
            <table:table-row>
              <table:table-cell office:value-type="string">
                <text:p>Август</text:p>
              </table:table-cell>
              <table:table-cell office:value-type="float" office:value="106.8">
                <text:p>106.8</text:p>
              </table:table-cell>
              <table:table-cell office:value-type="float" office:value="3310.8">
                <text:p>3310.8</text:p>
              </table:table-cell>
            </table:table-row>
            <table:table-row>
              <table:table-cell office:value-type="string">
                <text:p>Сентябрь </text:p>
              </table:table-cell>
              <table:table-cell office:value-type="float" office:value="105">
                <text:p>105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string">
                <text:p>Октябрь</text:p>
              </table:table-cell>
              <table:table-cell office:value-type="float" office:value="107">
                <text:p>107</text:p>
              </table:table-cell>
              <table:table-cell office:value-type="float" office:value="2782">
                <text:p>2782</text:p>
              </table:table-cell>
            </table:table-row>
            <table:table-row>
              <table:table-cell office:value-type="string">
                <text:p>Ноябрь</text:p>
              </table:table-cell>
              <table:table-cell office:value-type="float" office:value="103">
                <text:p>103</text:p>
              </table:table-cell>
              <table:table-cell office:value-type="float" office:value="2266">
                <text:p>2266</text:p>
              </table:table-cell>
            </table:table-row>
            <table:table-row>
              <table:table-cell office:value-type="string">
                <text:p>Декабрь </text:p>
              </table:table-cell>
              <table:table-cell office:value-type="float" office:value="108">
                <text:p>108</text:p>
              </table:table-cell>
              <table:table-cell office:value-type="float" office:value="3132">
                <text:p>313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6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821cm" svg:y="3.954cm" chart:style-name="ch2"/>
        <chart:plot-area chart:style-name="ch3" table:cell-range-address="' графики'.A1:' графики'.V3" chart:data-source-has-labels="column" svg:x="0.77cm" svg:y="0.855cm" svg:width="13.411cm" svg:height="7.545cm">
          <chartooo:coordinate-region svg:x="0.916cm" svg:y="1.067cm" svg:width="13.171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 графики'.B2:' графики'.V2" chart:label-cell-address="' графики'.A2:' графики'.A2" chart:class="chart:scatter">
            <chart:domain table:cell-range-address="' графики'.B1:' графики'.V1"/>
            <chart:data-point chart:repeated="21"/>
          </chart:series>
          <chart:series chart:style-name="ch7" chart:values-cell-range-address="' графики'.B3:' графики'.V3" chart:label-cell-address="' графики'.A3:' графики'.A3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  <draw:g>
                  <svg:desc/>
                </draw:g>
              </table:table-cell>
              <table:table-cell office:value-type="float" office:value="-5">
                <text:p>-5</text:p>
                <draw:g>
                  <svg:desc>' графики'.B1:' графики'.V1</svg:desc>
                </draw:g>
              </table:table-cell>
              <table:table-cell office:value-type="float" office:value="-4.5">
                <text:p>-4.5</text:p>
              </table:table-cell>
              <table:table-cell office:value-type="float" office:value="-4">
                <text:p>-4</text:p>
              </table:table-cell>
              <table:table-cell office:value-type="float" office:value="-3.5">
                <text:p>-3.5</text:p>
              </table:table-cell>
              <table:table-cell office:value-type="float" office:value="-3">
                <text:p>-3</text:p>
              </table:table-cell>
              <table:table-cell office:value-type="float" office:value="-2.5">
                <text:p>-2.5</text:p>
              </table:table-cell>
              <table:table-cell office:value-type="float" office:value="-2">
                <text:p>-2</text:p>
              </table:table-cell>
              <table:table-cell office:value-type="float" office:value="-1.5">
                <text:p>-1.5</text:p>
              </table:table-cell>
              <table:table-cell office:value-type="float" office:value="-1">
                <text:p>-1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y1</text:p>
                <draw:g>
                  <svg:desc>' графики'.A2:' графики'.A2</svg:desc>
                </draw:g>
              </table:table-cell>
              <table:table-cell office:value-type="float" office:value="3.38051500624659">
                <text:p>3.38051500624659</text:p>
                <draw:g>
                  <svg:desc>' графики'.B2:' графики'.V2</svg:desc>
                </draw:g>
              </table:table-cell>
              <table:table-cell office:value-type="float" office:value="-4.63733205455119">
                <text:p>-4.63733205455119</text:p>
              </table:table-cell>
              <table:table-cell office:value-type="float" office:value="-1.15782128234958">
                <text:p>-1.15782128234958</text:p>
              </table:table-cell>
              <table:table-cell office:value-type="float" office:value="-0.374585640158595">
                <text:p>-0.374585640158595</text:p>
              </table:table-cell>
              <table:table-cell office:value-type="float" office:value="0.142546543074278">
                <text:p>0.142546543074278</text:p>
              </table:table-cell>
              <table:table-cell office:value-type="float" office:value="0.74702229723866">
                <text:p>0.74702229723866</text:p>
              </table:table-cell>
              <table:table-cell office:value-type="float" office:value="2.18503986326152">
                <text:p>2.18503986326152</text:p>
              </table:table-cell>
              <table:table-cell office:value-type="float" office:value="-14.1014199471717">
                <text:p>-14.1014199471717</text:p>
              </table:table-cell>
              <table:table-cell office:value-type="float" office:value="-1.5574077246549">
                <text:p>-1.5574077246549</text:p>
              </table:table-cell>
              <table:table-cell office:value-type="float" office:value="-0.54630248984379">
                <text:p>-0.54630248984379</text:p>
              </table:table-cell>
              <table:table-cell office:value-type="float" office:value="0">
                <text:p>0</text:p>
              </table:table-cell>
              <table:table-cell office:value-type="float" office:value="0.54630248984379">
                <text:p>0.54630248984379</text:p>
              </table:table-cell>
              <table:table-cell office:value-type="float" office:value="1.5574077246549">
                <text:p>1.5574077246549</text:p>
              </table:table-cell>
              <table:table-cell office:value-type="float" office:value="14.1014199471717">
                <text:p>14.1014199471717</text:p>
              </table:table-cell>
              <table:table-cell office:value-type="float" office:value="-2.18503986326152">
                <text:p>-2.18503986326152</text:p>
              </table:table-cell>
              <table:table-cell office:value-type="float" office:value="-0.74702229723866">
                <text:p>-0.74702229723866</text:p>
              </table:table-cell>
              <table:table-cell office:value-type="float" office:value="-0.142546543074278">
                <text:p>-0.142546543074278</text:p>
              </table:table-cell>
              <table:table-cell office:value-type="float" office:value="0.374585640158595">
                <text:p>0.374585640158595</text:p>
              </table:table-cell>
              <table:table-cell office:value-type="float" office:value="1.15782128234958">
                <text:p>1.15782128234958</text:p>
              </table:table-cell>
              <table:table-cell office:value-type="float" office:value="4.63733205455119">
                <text:p>4.63733205455119</text:p>
              </table:table-cell>
              <table:table-cell office:value-type="float" office:value="-3.38051500624659">
                <text:p>-3.38051500624659</text:p>
              </table:table-cell>
            </table:table-row>
            <table:table-row>
              <table:table-cell office:value-type="string">
                <text:p>y2</text:p>
                <draw:g>
                  <svg:desc>' графики'.A3:' графики'.A3</svg:desc>
                </draw:g>
              </table:table-cell>
              <table:table-cell office:value-type="float" office:value="0.295812915532745">
                <text:p>0.295812915532745</text:p>
                <draw:g>
                  <svg:desc>' графики'.B3:' графики'.V3</svg:desc>
                </draw:g>
              </table:table-cell>
              <table:table-cell office:value-type="float" office:value="-0.215641232552794">
                <text:p>-0.215641232552794</text:p>
              </table:table-cell>
              <table:table-cell office:value-type="float" office:value="-0.863691154450617">
                <text:p>-0.863691154450617</text:p>
              </table:table-cell>
              <table:table-cell office:value-type="float" office:value="-2.66961648496887">
                <text:p>-2.66961648496887</text:p>
              </table:table-cell>
              <table:table-cell office:value-type="float" office:value="7.01525255143453">
                <text:p>7.01525255143453</text:p>
              </table:table-cell>
              <table:table-cell office:value-type="float" office:value="1.33864812830415">
                <text:p>1.33864812830415</text:p>
              </table:table-cell>
              <table:table-cell office:value-type="float" office:value="0.457657554360286">
                <text:p>0.457657554360286</text:p>
              </table:table-cell>
              <table:table-cell office:value-type="float" office:value="-0.0709148443026525">
                <text:p>-0.0709148443026525</text:p>
              </table:table-cell>
              <table:table-cell office:value-type="float" office:value="-0.642092615934331">
                <text:p>-0.642092615934331</text:p>
              </table:table-cell>
              <table:table-cell office:value-type="float" office:value="-1.83048772171245">
                <text:p>-1.83048772171245</text:p>
              </table:table-cell>
              <table:table-cell office:value-type="float" office:value="NaN">
                <text:p>NaN</text:p>
              </table:table-cell>
              <table:table-cell office:value-type="float" office:value="1.83048772171245">
                <text:p>1.83048772171245</text:p>
              </table:table-cell>
              <table:table-cell office:value-type="float" office:value="0.642092615934331">
                <text:p>0.642092615934331</text:p>
              </table:table-cell>
              <table:table-cell office:value-type="float" office:value="0.0709148443026525">
                <text:p>0.0709148443026525</text:p>
              </table:table-cell>
              <table:table-cell office:value-type="float" office:value="-0.457657554360286">
                <text:p>-0.457657554360286</text:p>
              </table:table-cell>
              <table:table-cell office:value-type="float" office:value="-1.33864812830415">
                <text:p>-1.33864812830415</text:p>
              </table:table-cell>
              <table:table-cell office:value-type="float" office:value="-7.01525255143453">
                <text:p>-7.01525255143453</text:p>
              </table:table-cell>
              <table:table-cell office:value-type="float" office:value="2.66961648496887">
                <text:p>2.66961648496887</text:p>
              </table:table-cell>
              <table:table-cell office:value-type="float" office:value="0.863691154450617">
                <text:p>0.863691154450617</text:p>
              </table:table-cell>
              <table:table-cell office:value-type="float" office:value="0.215641232552794">
                <text:p>0.215641232552794</text:p>
              </table:table-cell>
              <table:table-cell office:value-type="float" office:value="-0.295812915532745">
                <text:p>-0.2958129155327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6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821cm" svg:y="3.954cm" chart:style-name="ch2"/>
        <chart:plot-area chart:style-name="ch3" table:cell-range-address="' графики'.B28:' графики'.U30 ' графики'.A29:' графики'.A30" chart:data-source-has-labels="column" svg:x="0.77cm" svg:y="0.855cm" svg:width="13.411cm" svg:height="7.545cm">
          <chartooo:coordinate-region svg:x="1.603cm" svg:y="1.067cm" svg:width="12.391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 графики'.B29:' графики'.U29" chart:label-cell-address="' графики'.A29:' графики'.A29" chart:class="chart:scatter">
            <chart:domain table:cell-range-address="' графики'.B28:' графики'.U28"/>
            <chart:data-point chart:repeated="20"/>
          </chart:series>
          <chart:series chart:style-name="ch7" chart:values-cell-range-address="' графики'.B30:' графики'.U30" chart:label-cell-address="' графики'.A30:' графики'.A30" chart:class="chart:scatte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Строка 28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' графики'.B28:' графики'.U2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y1</text:p>
                <draw:g>
                  <svg:desc>' графики'.A29:' графики'.A29</svg:desc>
                </draw:g>
              </table:table-cell>
              <table:table-cell office:value-type="float" office:value="-0.693147180559945">
                <text:p>-0.693147180559945</text:p>
                <draw:g>
                  <svg:desc>' графики'.B29:' графики'.U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405465108108164">
                <text:p>0.405465108108164</text:p>
              </table:table-cell>
              <table:table-cell office:value-type="float" office:value="0.693147180559945">
                <text:p>0.693147180559945</text:p>
              </table:table-cell>
              <table:table-cell office:value-type="float" office:value="0.916290731874155">
                <text:p>0.916290731874155</text:p>
              </table:table-cell>
              <table:table-cell office:value-type="float" office:value="1.09861228866811">
                <text:p>1.09861228866811</text:p>
              </table:table-cell>
              <table:table-cell office:value-type="float" office:value="1.25276296849537">
                <text:p>1.25276296849537</text:p>
              </table:table-cell>
              <table:table-cell office:value-type="float" office:value="1.38629436111989">
                <text:p>1.38629436111989</text:p>
              </table:table-cell>
              <table:table-cell office:value-type="float" office:value="1.50407739677627">
                <text:p>1.50407739677627</text:p>
              </table:table-cell>
              <table:table-cell office:value-type="float" office:value="1.6094379124341">
                <text:p>1.6094379124341</text:p>
              </table:table-cell>
              <table:table-cell office:value-type="float" office:value="1.70474809223843">
                <text:p>1.70474809223843</text:p>
              </table:table-cell>
              <table:table-cell office:value-type="float" office:value="1.79175946922806">
                <text:p>1.79175946922806</text:p>
              </table:table-cell>
              <table:table-cell office:value-type="float" office:value="1.87180217690159">
                <text:p>1.87180217690159</text:p>
              </table:table-cell>
              <table:table-cell office:value-type="float" office:value="1.94591014905531">
                <text:p>1.94591014905531</text:p>
              </table:table-cell>
              <table:table-cell office:value-type="float" office:value="2.01490302054226">
                <text:p>2.01490302054226</text:p>
              </table:table-cell>
              <table:table-cell office:value-type="float" office:value="2.07944154167984">
                <text:p>2.07944154167984</text:p>
              </table:table-cell>
              <table:table-cell office:value-type="float" office:value="2.14006616349627">
                <text:p>2.14006616349627</text:p>
              </table:table-cell>
              <table:table-cell office:value-type="float" office:value="2.19722457733622">
                <text:p>2.19722457733622</text:p>
              </table:table-cell>
              <table:table-cell office:value-type="float" office:value="2.2512917986065">
                <text:p>2.2512917986065</text:p>
              </table:table-cell>
              <table:table-cell office:value-type="float" office:value="2.30258509299405">
                <text:p>2.30258509299405</text:p>
              </table:table-cell>
            </table:table-row>
            <table:table-row>
              <table:table-cell office:value-type="string">
                <text:p>y2</text:p>
                <draw:g>
                  <svg:desc>' графики'.A30:' графики'.A30</svg:desc>
                </draw:g>
              </table:table-cell>
              <table:table-cell office:value-type="float" office:value="-0.301029995663981">
                <text:p>-0.301029995663981</text:p>
                <draw:g>
                  <svg:desc>' графики'.B30:' графики'.U3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176091259055681">
                <text:p>0.176091259055681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0.397940008672038">
                <text:p>0.397940008672038</text:p>
              </table:table-cell>
              <table:table-cell office:value-type="float" office:value="0.477121254719662">
                <text:p>0.477121254719662</text:p>
              </table:table-cell>
              <table:table-cell office:value-type="float" office:value="0.544068044350276">
                <text:p>0.544068044350276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53212513775344">
                <text:p>0.653212513775344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0.740362689494244">
                <text:p>0.740362689494244</text:p>
              </table:table-cell>
              <table:table-cell office:value-type="float" office:value="0.778151250383644">
                <text:p>0.778151250383644</text:p>
              </table:table-cell>
              <table:table-cell office:value-type="float" office:value="0.812913356642856">
                <text:p>0.812913356642856</text:p>
              </table:table-cell>
              <table:table-cell office:value-type="float" office:value="0.845098040014257">
                <text:p>0.845098040014257</text:p>
              </table:table-cell>
              <table:table-cell office:value-type="float" office:value="0.8750612633917">
                <text:p>0.8750612633917</text:p>
              </table:table-cell>
              <table:table-cell office:value-type="float" office:value="0.903089986991943">
                <text:p>0.903089986991943</text:p>
              </table:table-cell>
              <table:table-cell office:value-type="float" office:value="0.929418925714293">
                <text:p>0.929418925714293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77723605288848">
                <text:p>0.97772360528884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6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